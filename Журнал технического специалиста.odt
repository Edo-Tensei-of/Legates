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920000009CBDD1F8D6.png" manifest:media-type="image/png"/>
  <manifest:file-entry manifest:full-path="Pictures/10000000000004F4000004E7426B5B32.png" manifest:media-type="image/png"/>
  <manifest:file-entry manifest:full-path="Pictures/10000000000000A500000465041940CA.png" manifest:media-type="image/png"/>
  <manifest:file-entry manifest:full-path="Pictures/10000000000003E2000003C4675242AA.png" manifest:media-type="image/png"/>
  <manifest:file-entry manifest:full-path="Pictures/10000000000003D2000003DE9435DFC5.png" manifest:media-type="image/png"/>
  <manifest:file-entry manifest:full-path="Pictures/10000000000003E7000003D88D89A2D8.png" manifest:media-type="image/png"/>
  <manifest:file-entry manifest:full-path="Pictures/100000000000035500000306E78F680A.png" manifest:media-type="image/png"/>
  <manifest:file-entry manifest:full-path="Pictures/10000000000003660000039B8BA9A514.png" manifest:media-type="image/png"/>
  <manifest:file-entry manifest:full-path="Pictures/10000000000003E8000003B6BE517AC5.png" manifest:media-type="image/png"/>
  <manifest:file-entry manifest:full-path="Pictures/10000000000003D9000003CC1AE84DA4.png" manifest:media-type="image/png"/>
  <manifest:file-entry manifest:full-path="Pictures/100000000000068E0000049B330F61C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1" svg:font-family="'Open Sans', Arial, 'Helvetica CY', Helvetica, Roboto, 'Nimbus Sans L', sans-serif"/>
    <style:font-face style:name="system-ui" svg:font-family="system-ui, ui-sans-serif, apple-system, BlinkMacSystemFont, Inter, NotoSansHans, sans-serif"/>
    <style:font-face style:name="Times new roman2" svg:font-family="'Times new roman'" style:font-family-generic="roman"/>
    <style:font-face style:name="Times new roman1" svg:font-family="'Times new roman'" style:font-adornments="Жирный" style:font-family-generic="roman"/>
    <style:font-face style:name="Times new roman" svg:font-family="'Times new roman'" style:font-adornments="Обычный" style:font-family-generic="roman"/>
    <style:font-face style:name="Droid Sans1" svg:font-family="'Droid Sans'" style:font-family-generic="swiss"/>
    <style:font-face style:name="Open Sans2" svg:font-family="'Open Sans'" style:font-adornments="Обычный" style:font-family-generic="swiss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002cm" table:align="margins"/>
    </style:style>
    <style:style style:name="Таблица1.A" style:family="table-column">
      <style:table-column-properties style:column-width="2.893cm" style:rel-column-width="11150*"/>
    </style:style>
    <style:style style:name="Таблица1.B" style:family="table-column">
      <style:table-column-properties style:column-width="8.698cm" style:rel-column-width="33525*"/>
    </style:style>
    <style:style style:name="Таблица1.C" style:family="table-column">
      <style:table-column-properties style:column-width="1.159cm" style:rel-column-width="4466*"/>
    </style:style>
    <style:style style:name="Таблица1.D" style:family="table-column">
      <style:table-column-properties style:column-width="4.253cm" style:rel-column-width="16394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2" fo:font-size="18pt" fo:font-weight="bold" officeooo:rsid="000c7e59" officeooo:paragraph-rsid="000c7e59" style:font-size-asian="18pt" style:font-weight-asian="bold" style:font-size-complex="18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2" fo:font-size="18pt" fo:font-weight="bold" officeooo:rsid="000c7e59" officeooo:paragraph-rsid="000c7e59" style:font-size-asian="18pt" style:font-weight-asian="bold" style:font-size-complex="18pt" style:font-weight-complex="bold"/>
    </style:style>
    <style:style style:name="P4" style:family="paragraph" style:parent-style-name="Standard">
      <style:paragraph-properties fo:line-height="150%"/>
      <style:text-properties style:font-name="Times new roman2"/>
    </style:style>
    <style:style style:name="P5" style:family="paragraph" style:parent-style-name="Standard">
      <style:text-properties fo:font-variant="normal" fo:text-transform="none" fo:color="#1d1d1f" style:font-name="system-ui" fo:font-size="12pt" fo:letter-spacing="normal" fo:font-style="normal" fo:font-weight="normal" officeooo:rsid="0015c508" officeooo:paragraph-rsid="0015c508" fo:padding="0cm" fo:border="none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Text_20_body">
      <style:paragraph-properties fo:text-align="justify" style:justify-single-word="false"/>
      <style:text-properties officeooo:rsid="00284aac" officeooo:paragraph-rsid="00284aac"/>
    </style:style>
    <style:style style:name="P9" style:family="paragraph" style:parent-style-name="Text_20_body">
      <style:paragraph-properties fo:text-align="justify" style:justify-single-word="false"/>
      <style:text-properties officeooo:paragraph-rsid="00284aac"/>
    </style:style>
    <style:style style:name="P10" style:family="paragraph" style:parent-style-name="Text_20_body">
      <style:paragraph-properties fo:text-align="justify" style:justify-single-word="false"/>
      <style:text-properties officeooo:rsid="0031e8ba" officeooo:paragraph-rsid="0031e8ba"/>
    </style:style>
    <style:style style:name="P11" style:family="paragraph" style:parent-style-name="Text_20_body">
      <style:paragraph-properties fo:text-align="justify" style:justify-single-word="false"/>
      <style:text-properties officeooo:rsid="0015c508" officeooo:paragraph-rsid="00284aac"/>
    </style:style>
    <style:style style:name="P12" style:family="paragraph" style:parent-style-name="Text_20_body">
      <style:text-properties officeooo:rsid="0017b272" officeooo:paragraph-rsid="0017b272"/>
    </style:style>
    <style:style style:name="P13" style:family="paragraph" style:parent-style-name="Text_20_body">
      <style:text-properties fo:font-variant="normal" fo:text-transform="none" fo:color="#1d1d1f" style:font-name="system-ui" fo:font-size="12pt" fo:letter-spacing="normal" fo:font-style="normal" fo:font-weight="normal" officeooo:paragraph-rsid="0017b272" style:font-weight-asian="normal" style:font-weight-complex="normal" fo:padding="0cm" fo:border="none"/>
    </style:style>
    <style:style style:name="P14" style:family="paragraph" style:parent-style-name="Text_20_body">
      <style:text-properties officeooo:rsid="001824f2" officeooo:paragraph-rsid="001824f2"/>
    </style:style>
    <style:style style:name="P15" style:family="paragraph" style:parent-style-name="Text_20_body">
      <style:text-properties officeooo:rsid="001ae71c" officeooo:paragraph-rsid="001ae71c"/>
    </style:style>
    <style:style style:name="P16" style:family="paragraph" style:parent-style-name="Text_20_body">
      <style:text-properties officeooo:paragraph-rsid="0018e866"/>
    </style:style>
    <style:style style:name="P17" style:family="paragraph" style:parent-style-name="Text_20_body">
      <style:text-properties officeooo:rsid="001ed1cf" officeooo:paragraph-rsid="001ed1cf"/>
    </style:style>
    <style:style style:name="P18" style:family="paragraph" style:parent-style-name="Text_20_body">
      <style:text-properties officeooo:rsid="001f2e2e" officeooo:paragraph-rsid="001f2e2e"/>
    </style:style>
    <style:style style:name="P19" style:family="paragraph" style:parent-style-name="Text_20_body">
      <style:text-properties officeooo:rsid="001f2e2e" officeooo:paragraph-rsid="0020b230"/>
    </style:style>
    <style:style style:name="P20" style:family="paragraph" style:parent-style-name="Text_20_body">
      <style:text-properties officeooo:rsid="0020b230" officeooo:paragraph-rsid="0020b230"/>
    </style:style>
    <style:style style:name="P21" style:family="paragraph" style:parent-style-name="Text_20_body">
      <style:text-properties officeooo:rsid="002241a4" officeooo:paragraph-rsid="002241a4"/>
    </style:style>
    <style:style style:name="P22" style:family="paragraph" style:parent-style-name="Text_20_body">
      <style:text-properties officeooo:paragraph-rsid="001ed1cf"/>
    </style:style>
    <style:style style:name="P23" style:family="paragraph" style:parent-style-name="Text_20_body">
      <style:text-properties officeooo:paragraph-rsid="00137e76"/>
    </style:style>
    <style:style style:name="P24" style:family="paragraph" style:parent-style-name="Text_20_body">
      <style:paragraph-properties fo:margin-left="0cm" fo:margin-right="0cm" fo:margin-top="0cm" fo:margin-bottom="0cm" loext:contextual-spacing="false" fo:line-height="175%" fo:orphans="2" fo:widows="2" fo:text-indent="0cm" style:auto-text-indent="false" fo:padding="0cm" fo:border="none"/>
    </style:style>
    <style:style style:name="P2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2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paragraph-rsid="003218be"/>
    </style:style>
    <style:style style:name="P27" style:family="paragraph" style:parent-style-name="Text_20_body">
      <style:paragraph-properties fo:margin-left="0cm" fo:margin-right="0cm" fo:text-indent="0cm" style:auto-text-indent="false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officeooo:rsid="001824f2"/>
    </style:style>
    <style:style style:name="P29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000000" style:font-name="Open Sans1" fo:font-size="12pt" fo:letter-spacing="normal" fo:font-style="normal" fo:font-weight="normal" officeooo:rsid="0035dc69" officeooo:paragraph-rsid="0035dc69" style:font-size-asian="12pt" style:font-weight-asian="normal" style:font-size-complex="12pt" style:font-weight-complex="normal"/>
    </style:style>
    <style:style style:name="P30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Open Sans1" fo:font-size="12pt" fo:letter-spacing="normal" fo:font-style="normal" fo:font-weight="normal" officeooo:rsid="0035dc69" officeooo:paragraph-rsid="0035dc69" style:font-size-asian="12pt" style:font-weight-asian="normal" style:font-size-complex="12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officeooo:rsid="001ae71c" officeooo:paragraph-rsid="001ae71c"/>
    </style:style>
    <style:style style:name="P32" style:family="paragraph" style:parent-style-name="Table_20_Contents">
      <style:text-properties officeooo:rsid="001ae71c" officeooo:paragraph-rsid="001ae71c"/>
    </style:style>
    <style:style style:name="P33" style:family="paragraph" style:parent-style-name="Table_20_Contents">
      <style:text-properties officeooo:rsid="001ae71c" officeooo:paragraph-rsid="003403dd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text-properties officeooo:rsid="0035dc69" officeooo:paragraph-rsid="0035dc69"/>
    </style:style>
    <style:style style:name="P36" style:family="paragraph" style:parent-style-name="Table_20_Contents">
      <style:paragraph-properties fo:text-align="center" style:justify-single-word="false"/>
      <style:text-properties officeooo:rsid="0035dc69" officeooo:paragraph-rsid="0035dc69"/>
    </style:style>
    <style:style style:name="P37" style:family="paragraph" style:parent-style-name="Table_20_Contents">
      <style:paragraph-properties fo:text-align="center" style:justify-single-word="false"/>
      <style:text-properties officeooo:rsid="003403dd" officeooo:paragraph-rsid="003403dd"/>
    </style:style>
    <style:style style:name="P38" style:family="paragraph" style:parent-style-name="Table_20_Contents">
      <style:text-properties officeooo:rsid="003403dd" officeooo:paragraph-rsid="003403dd"/>
    </style:style>
    <style:style style:name="P39" style:family="paragraph" style:parent-style-name="Table_20_Contents">
      <style:text-properties officeooo:rsid="0029ccd8" officeooo:paragraph-rsid="0029ccd8"/>
    </style:style>
    <style:style style:name="P40" style:family="paragraph" style:parent-style-name="Table_20_Contents">
      <style:paragraph-properties fo:text-align="center" style:justify-single-word="false"/>
      <style:text-properties officeooo:rsid="0029ccd8" officeooo:paragraph-rsid="0029ccd8"/>
    </style:style>
    <style:style style:name="P41" style:family="paragraph" style:parent-style-name="Table_20_Contents">
      <style:text-properties officeooo:paragraph-rsid="001b0c53"/>
    </style:style>
    <style:style style:name="P42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2" fo:font-size="18pt" fo:font-weight="bold" officeooo:rsid="00260f34" officeooo:paragraph-rsid="00260f34" style:font-size-asian="18pt" style:font-weight-asian="bold" style:font-size-complex="18pt" style:font-weight-complex="bold"/>
    </style:style>
    <style:style style:name="P43" style:family="paragraph" style:parent-style-name="Standard">
      <style:paragraph-properties fo:line-height="150%" fo:text-align="center" style:justify-single-word="false"/>
      <style:text-properties style:font-name="Times new roman2" fo:font-size="18pt" fo:font-weight="bold" officeooo:rsid="000c7e59" officeooo:paragraph-rsid="000c7e59" style:font-size-asian="18pt" style:font-weight-asian="bold" style:font-size-complex="18pt" style:font-weight-complex="bold"/>
    </style:style>
    <style:style style:name="P44" style:family="paragraph" style:parent-style-name="Text_20_body">
      <style:text-properties officeooo:paragraph-rsid="00284aac"/>
    </style:style>
    <style:style style:name="P45" style:family="paragraph" style:parent-style-name="Text_20_body">
      <style:text-properties officeooo:rsid="003c4493" officeooo:paragraph-rsid="003c4493"/>
    </style:style>
    <style:style style:name="P46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47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paragraph-rsid="003218be"/>
    </style:style>
    <style:style style:name="P48" style:family="paragraph" style:parent-style-name="Text_20_body">
      <style:paragraph-properties fo:margin-left="0cm" fo:margin-right="0cm" fo:margin-top="0cm" fo:margin-bottom="0cm" loext:contextual-spacing="false" fo:line-height="175%" fo:orphans="2" fo:widows="2" fo:text-indent="0cm" style:auto-text-indent="false" fo:padding="0cm" fo:border="none"/>
      <style:text-properties fo:font-variant="normal" fo:text-transform="none" fo:color="#1d1d1f" style:font-name="system-ui" fo:font-size="12pt" fo:letter-spacing="normal" fo:font-style="normal" fo:font-weight="normal" fo:padding="0cm" fo:border="none"/>
    </style:style>
    <style:style style:name="P49" style:family="paragraph" style:parent-style-name="Heading_20_2">
      <style:text-properties officeooo:rsid="00137e76" officeooo:paragraph-rsid="00137e76"/>
    </style:style>
    <style:style style:name="P50" style:family="paragraph" style:parent-style-name="Heading_20_2">
      <style:text-properties officeooo:rsid="0017b272" officeooo:paragraph-rsid="0017b272"/>
    </style:style>
    <style:style style:name="P51" style:family="paragraph" style:parent-style-name="Heading_20_2">
      <style:text-properties officeooo:rsid="001ed1cf" officeooo:paragraph-rsid="001ed1cf"/>
    </style:style>
    <style:style style:name="P52" style:family="paragraph" style:parent-style-name="Heading_20_2">
      <style:paragraph-properties fo:break-before="page"/>
      <style:text-properties officeooo:rsid="0018e866" officeooo:paragraph-rsid="0018e866"/>
    </style:style>
    <style:style style:name="P53" style:family="paragraph" style:parent-style-name="Heading_20_2">
      <style:paragraph-properties fo:break-before="page"/>
      <style:text-properties officeooo:rsid="001f2e2e" officeooo:paragraph-rsid="001f2e2e"/>
    </style:style>
    <style:style style:name="P54" style:family="paragraph" style:parent-style-name="Heading_20_2">
      <style:paragraph-properties fo:break-before="page"/>
      <style:text-properties officeooo:rsid="002241a4" officeooo:paragraph-rsid="002241a4"/>
    </style:style>
    <style:style style:name="P55" style:family="paragraph" style:parent-style-name="Heading_20_1" style:master-page-name="Standard">
      <style:paragraph-properties style:page-number="1" fo:break-before="page"/>
      <style:text-properties officeooo:rsid="00137e76" officeooo:paragraph-rsid="00137e76"/>
    </style:style>
    <style:style style:name="P56" style:family="paragraph" style:parent-style-name="Heading_20_1">
      <style:paragraph-properties fo:break-before="page"/>
      <style:text-properties officeooo:rsid="00137e76" officeooo:paragraph-rsid="00137e76"/>
    </style:style>
    <style:style style:name="P57" style:family="paragraph" style:parent-style-name="Contents_20_Heading" style:master-page-name="Index">
      <style:paragraph-properties style:page-number="auto" fo:break-before="page"/>
    </style:style>
    <style:style style:name="T1" style:family="text">
      <style:text-properties officeooo:rsid="002ff97e"/>
    </style:style>
    <style:style style:name="T2" style:family="text">
      <style:text-properties officeooo:rsid="001560c5"/>
    </style:style>
    <style:style style:name="T3" style:family="text">
      <style:text-properties officeooo:rsid="00284aac"/>
    </style:style>
    <style:style style:name="T4" style:family="text">
      <style:text-properties fo:font-variant="normal" fo:text-transform="none" fo:color="#1d1d1f" style:font-name="system-ui" fo:font-size="12pt" fo:letter-spacing="normal" fo:font-style="normal" fo:font-weight="normal" style:font-weight-asian="normal" style:font-weight-complex="normal" fo:padding="0cm" fo:border="none"/>
    </style:style>
    <style:style style:name="T5" style:family="text">
      <style:text-properties fo:font-variant="normal" fo:text-transform="none" fo:color="#1d1d1f" style:font-name="system-ui" fo:font-size="12pt" fo:letter-spacing="normal" fo:font-style="normal" fo:font-weight="normal" officeooo:rsid="003218be" style:font-weight-asian="normal" style:font-weight-complex="normal" fo:padding="0cm" fo:border="none"/>
    </style:style>
    <style:style style:name="T6" style:family="text">
      <style:text-properties fo:font-variant="normal" fo:text-transform="none" fo:color="#1d1d1f" style:font-name="system-ui" fo:font-size="12pt" fo:letter-spacing="normal" fo:font-style="normal" fo:font-weight="normal" officeooo:rsid="003a1f8c" style:font-weight-asian="normal" style:font-weight-complex="normal" fo:padding="0cm" fo:border="none"/>
    </style:style>
    <style:style style:name="T7" style:family="text">
      <style:text-properties fo:font-variant="normal" fo:text-transform="none" fo:color="#1d1d1f" style:font-name="system-ui" fo:font-size="12pt" fo:letter-spacing="normal" fo:font-style="normal" fo:font-weight="normal" fo:padding="0cm" fo:border="none"/>
    </style:style>
    <style:style style:name="T8" style:family="text">
      <style:text-properties fo:font-variant="normal" fo:text-transform="none" fo:color="#1d1d1f" style:font-name="system-ui" fo:font-size="12pt" fo:letter-spacing="normal" fo:language="en" fo:country="US" fo:font-style="normal" fo:font-weight="normal" officeooo:rsid="003a1f8c" style:font-weight-asian="normal" style:font-weight-complex="normal" fo:padding="0cm" fo:border="none"/>
    </style:style>
    <style:style style:name="T9" style:family="text">
      <style:text-properties fo:font-variant="normal" fo:text-transform="none" fo:color="#1d1d1f" style:font-name="system-ui" fo:font-size="12pt" fo:letter-spacing="normal" fo:language="ru" fo:country="RU" fo:font-style="normal" fo:font-weight="normal" officeooo:rsid="003a1f8c" style:font-weight-asian="normal" style:font-weight-complex="normal" fo:padding="0cm" fo:border="none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font-size="14pt" fo:font-weight="normal" officeooo:rsid="0017b272" style:font-size-asian="14pt" style:font-weight-asian="normal" style:font-size-complex="14pt" style:font-weight-complex="normal"/>
    </style:style>
    <style:style style:name="T12" style:family="text">
      <style:text-properties style:font-name="Times new roman" fo:font-size="14pt" officeooo:rsid="0017b272" style:font-size-asian="14pt" style:font-size-complex="14pt"/>
    </style:style>
    <style:style style:name="T13" style:family="text">
      <style:text-properties style:font-name="Times new roman" fo:font-size="14pt" fo:font-weight="bold" officeooo:rsid="0017b272" style:font-size-asian="14pt" style:font-weight-asian="bold" style:font-size-complex="14pt" style:font-weight-complex="bold"/>
    </style:style>
    <style:style style:name="T14" style:family="text">
      <style:text-properties officeooo:rsid="0029ccd8"/>
    </style:style>
    <style:style style:name="T15" style:family="text">
      <style:text-properties officeooo:rsid="003403dd"/>
    </style:style>
    <style:style style:name="T16" style:family="text">
      <style:text-properties style:font-name="Open Sans2"/>
    </style:style>
    <style:style style:name="T17" style:family="text">
      <style:text-properties officeooo:rsid="00238aad"/>
    </style:style>
    <style:style style:name="T18" style:family="text">
      <style:text-properties officeooo:rsid="0020b230"/>
    </style:style>
    <style:style style:name="T19" style:family="text">
      <style:text-properties officeooo:rsid="00242ec5"/>
    </style:style>
    <style:style style:name="T20" style:family="text">
      <style:text-properties fo:language="en" fo:country="US"/>
    </style:style>
    <style:style style:name="T21" style:family="text">
      <style:text-properties officeooo:rsid="003a1f8c"/>
    </style:style>
    <style:style style:name="T22" style:family="text">
      <style:text-properties fo:language="ru" fo:country="RU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3a8125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1.251cm"/>
      </text:list-level-style-bullet>
      <text:list-level-style-bullet text:level="2" text:style-name="Bullet_20_Symbols" style:num-suffix="." text:bullet-char="•">
        <style:list-level-properties text:space-before="1.251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Государственное бюджетное профессиональное образовательное учреждение Астраханской области «Астраханский колледж вычислительной техники»</text:p>
      <text:p text:style-name="P2">Государственная итоговая аттестация</text:p>
      <text:p text:style-name="P2">Демонстрационный экзамен</text:p>
      <text:p text:style-name="P2">Базовый уровень</text:p>
      <text:p text:style-name="P2"/>
      <text:p text:style-name="P2"/>
      <text:p text:style-name="P2"/>
      <text:p text:style-name="P2">ЖУРНАЛ ТЕХНИЧЕСКОГО СПЕЦИАЛИСТА</text:p>
      <text:p text:style-name="P2"/>
      <text:p text:style-name="P2">09.02.01 Компьютерные системы и комплексы</text:p>
      <text:p text:style-name="P2">Специалист по компьютерным системам</text:p>
      <text:p text:style-name="P2"/>
      <text:p text:style-name="P2"/>
      <text:p text:style-name="P2"/>
      <text:p text:style-name="P3">Выпускник:<text:tab/><text:tab/><text:tab/><text:tab/><text:tab/><text:tab/><text:tab/><text:tab/><text:span text:style-name="T1">Янченко Д.В.</text:span></text:p>
      <text:p text:style-name="P2"/>
      <text:p text:style-name="P2"/>
      <text:p text:style-name="P2"/>
      <text:p text:style-name="P2"/>
      <text:p text:style-name="P2">2026 год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7">Содержание</text:p>
          </text:index-title>
          <text:p text:style-name="P6"><text:a xlink:type="simple" xlink:href="#__RefHeading___Toc1127_2825539701" text:style-name="Index_20_Link" text:visited-style-name="Index_20_Link">1. Схемотехнический раздел<text:tab/>1</text:a></text:p>
          <text:p text:style-name="P7"><text:a xlink:type="simple" xlink:href="#__RefHeading___Toc1519_2825539701" text:style-name="Index_20_Link" text:visited-style-name="Index_20_Link">1.1. Анализ задания на проектирование.<text:tab/>1</text:a></text:p>
          <text:p text:style-name="P7"><text:a xlink:type="simple" xlink:href="#__RefHeading___Toc1727_2825539701" text:style-name="Index_20_Link" text:visited-style-name="Index_20_Link">1.3. Описание схемы электрической принципиальной.<text:tab/>2</text:a></text:p>
          <text:p text:style-name="P7"><text:a xlink:type="simple" xlink:href="#__RefHeading___Toc1880_2825539701" text:style-name="Index_20_Link" text:visited-style-name="Index_20_Link">1.5. Перечень элементов.<text:tab/>4</text:a></text:p>
          <text:p text:style-name="P6"><text:a xlink:type="simple" xlink:href="#__RefHeading___Toc1257_2825539701" text:style-name="Index_20_Link" text:visited-style-name="Index_20_Link">2. Конструкторский раздел<text:tab/>5</text:a></text:p>
          <text:p text:style-name="P7"><text:a xlink:type="simple" xlink:href="#__RefHeading___Toc1979_2825539701" text:style-name="Index_20_Link" text:visited-style-name="Index_20_Link">2.1. Разработка принципиальной схемы в САПР KiCAD.<text:tab/>5</text:a></text:p>
          <text:p text:style-name="P7"><text:a xlink:type="simple" xlink:href="#__RefHeading___Toc1981_2825539701" text:style-name="Index_20_Link" text:visited-style-name="Index_20_Link">2.2. Чертежи печатной платы в САПР KiCAD.<text:tab/>6</text:a></text:p>
          <text:p text:style-name="P7"><text:a xlink:type="simple" xlink:href="#__RefHeading___Toc1983_2825539701" text:style-name="Index_20_Link" text:visited-style-name="Index_20_Link">2.3. Чертеж общего вида в САПР KiCAD.<text:tab/>10</text:a></text:p>
        </text:index-body>
      </text:table-of-content>
      <text:p text:style-name="P2"/>
      <text:p text:style-name="P4"/>
      <text:h text:style-name="P55" text:outline-level="1"><text:bookmark-start text:name="__RefHeading___Toc1127_2825539701"/>1. Схемотехнический раздел<text:bookmark-end text:name="__RefHeading___Toc1127_2825539701"/></text:h>
      <text:h text:style-name="P49" text:outline-level="2"><text:bookmark-start text:name="__RefHeading___Toc1519_2825539701"/>1.1. <text:span text:style-name="T2">Анализ задания на проектирование.</text:span><text:bookmark-end text:name="__RefHeading___Toc1519_2825539701"/></text:h>
      <text:p text:style-name="P8">Разработка устройства включает себя, разработку электрической принципиальной схемы, трассировку печатной платы, создание 3Д модели.</text:p>
      <text:p text:style-name="P9"><text:span text:style-name="T3">Устройства имеет микросхемы: две пары D-триггера, 74LS175. Пассивные элементы: 9 резисторов, номиналом 220 Ом и 1 кОм;</text:span></text:p>
      <text:p text:style-name="P10">Источник питания номиналом в 5 В;</text:p>
      <text:p text:style-name="P10">4 переключателя;</text:p>
      <text:p text:style-name="P10">8 красных светодиодов;</text:p>
      <text:p text:style-name="P10">1 тактовая кнопка.</text:p>
      <text:p text:style-name="P9"/>
      <text:p text:style-name="P11">1.2. Описание примененных компонентов.</text:p>
      <text:p text:style-name="P5">Ниже приведено описание всех компонентов, использованных в схеме, с указанием их технических характеристик, внешнего вида и типа корпуса.</text:p>
      <text:p text:style-name="P5"/>
      <text:p text:style-name="P24"><text:span text:style-name="Strong_20_Emphasis"><text:span text:style-name="T9">Две п</text:span></text:span><text:span text:style-name="Strong_20_Emphasis"><text:span text:style-name="T9">ары </text:span></text:span><text:span text:style-name="Strong_20_Emphasis"><text:span text:style-name="T8">D-</text:span></text:span><text:span text:style-name="Strong_20_Emphasis"><text:span text:style-name="T9">триг</text:span></text:span><text:span text:style-name="Strong_20_Emphasis"><text:span text:style-name="T8">г</text:span></text:span><text:span text:style-name="Strong_20_Emphasis"><text:span text:style-name="T9">ера </text:span></text:span><text:span text:style-name="Strong_20_Emphasis"><text:span text:style-name="T4">(74LS175)</text:span></text:span><text:span text:style-name="T4">: </text:span><text:span text:style-name="T6">м</text:span><text:span text:style-name="T4">икросхема, содержащая четыре D-триггера. </text:span><text:span text:style-name="Emphasis"><text:span text:style-name="T4">Корпус:</text:span></text:span><text:span text:style-name="T4"> DIP-16;</text:span></text:p>
      <text:p text:style-name="P26"><text:span text:style-name="Strong_20_Emphasis"><text:span text:style-name="T4">BT1</text:span></text:span><text:span text:style-name="T4">: </text:span><text:span text:style-name="T5">и</text:span><text:span text:style-name="T4">сточник питания. </text:span><text:span text:style-name="T5">Б</text:span><text:span text:style-name="T4">атарея 4.5В. </text:span><text:span text:style-name="Emphasis"><text:span text:style-name="T4">Корпус:</text:span></text:span><text:span text:style-name="T4"> Держатель Keystone 500;</text:span></text:p>
      <text:p text:style-name="P25"><text:span text:style-name="Strong_20_Emphasis"><text:span text:style-name="T4">D1 – D8</text:span></text:span><text:span text:style-name="T4">: </text:span><text:span text:style-name="T5">с</text:span><text:span text:style-name="T4">ветодиоды (LED). </text:span><text:span text:style-name="Emphasis"><text:span text:style-name="T4">Корпус:</text:span></text:span><text:span text:style-name="T4"> SMD 0805;</text:span></text:p>
      <text:p text:style-name="P25"><text:span text:style-name="Strong_20_Emphasis"><text:span text:style-name="T4">R1 – R9</text:span></text:span><text:span text:style-name="T4">: </text:span><text:span text:style-name="T5">р</text:span><text:span text:style-name="T4">езисторы. </text:span><text:span text:style-name="T6">в</text:span><text:span text:style-name="T4">се компоненты в корпусе SMD 1206:</text:span></text:p>
      <text:list xml:id="list3346754011901702366" text:style-name="L1">
        <text:list-item>
          <text:list>
            <text:list-item>
              <text:p text:style-name="P47"><text:span text:style-name="Strong_20_Emphasis"><text:span text:style-name="T4">220 Ом:</text:span></text:span><text:span text:style-name="T4"> R1, R2, R3, R6, R7, R4, R8, R9;</text:span></text:p>
            </text:list-item>
            <text:list-item>
              <text:p text:style-name="P46"><text:span text:style-name="Strong_20_Emphasis"><text:span text:style-name="T4">1 кОм:</text:span></text:span><text:span text:style-name="T4"> R5.</text:span></text:p>
            </text:list-item>
          </text:list>
        </text:list-item>
        <text:list-item>
          <text:p text:style-name="P46"><text:span text:style-name="Strong_20_Emphasis"><text:span text:style-name="T4">SW1, SW2, SW3, SW5</text:span></text:span><text:span text:style-name="T4">: </text:span><text:span text:style-name="T5">переключатели</text:span><text:span text:style-name="T4">.</text:span></text:p>
          <text:list>
            <text:list-item>
              <text:p text:style-name="P46"><text:span text:style-name="Emphasis"><text:span text:style-name="T4">Корпуса:</text:span></text:span><text:span text:style-name="T4"> SW_SPST_B3S-1100 (для SW1-SW3) и Nidec_Copal_CAS-120A (для SW5).</text:span></text:p>
            </text:list-item>
          </text:list>
        </text:list-item>
        <text:list-item>
          <text:p text:style-name="P46"><text:span text:style-name="Strong_20_Emphasis"><text:span text:style-name="T4">SW4</text:span></text:span><text:span text:style-name="T4">: </text:span><text:span text:style-name="T5">тактовая</text:span><text:span text:style-name="T4"> кнопка SMD (SW_MEC_5E).</text:span></text:p>
          <text:list>
            <text:list-item>
              <text:p text:style-name="P46"><text:span text:style-name="Emphasis"><text:span text:style-name="T7">Корпус:</text:span></text:span><text:span text:style-name="T7"> Panasonic_EVQPUL_EVQPUC.</text:span></text:p>
            </text:list-item>
          </text:list>
        </text:list-item>
      </text:list>
      <text:p text:style-name="P48"/>
      <text:h text:style-name="P50" text:outline-level="2"><text:bookmark-start text:name="__RefHeading___Toc1727_2825539701"/>1.3. Описание схемы электрической принципиальной.<text:bookmark-end text:name="__RefHeading___Toc1727_2825539701"/></text:h>
      <text:p text:style-name="P12">Общее назначение</text:p>
      <text:p text:style-name="Text_20_body"><text:bookmark-start text:name="__RefHeading___Toc1269_2572271089"/><text:soft-page-break/>Электрическая принципиальная схема описывает цифровое устройство, предназначенное для приема, хранения и визуальной индикации 4-разрядных двоичных данных.<text:bookmark-end text:name="__RefHeading___Toc1269_2572271089"/></text:p>
      <text:p text:style-name="P13">Устройство построено на базе интегральной микросхемы 74LS175 <text:s/>и выполняет функции простейшего параллельного регистра памяти. Основное назначение схемы — демонстрация и изучение принципов работы триггерных схем, а также процессов записи, хранения и аппаратного сброса цифровой информации.</text:p>
      <text:p text:style-name="P13">Функционально схема включает в себя:</text:p>
      <text:p text:style-name="P13">Блок ввода данных:<text:span text:style-name="T21"> </text:span><text:s/>формировани<text:span text:style-name="T21">е</text:span> логических уровней на входах триггеров <text:span text:style-name="T21">осуществляется с</text:span> помощью кнопок (SW1–SW3).</text:p>
      <text:p text:style-name="P13">Блок управления: генерация тактовых импульсов для записи данных, <text:span text:style-name="T21">используется кнопка - </text:span>SW4 и сигнал глобального сброса всех разрядов в ноль <text:s/>- <text:span text:style-name="T21">кнопка </text:span>SW5.</text:p>
      <text:p text:style-name="P13">Блок индикации: <text:span text:style-name="T21">для </text:span>наглядно<text:span text:style-name="T21">го</text:span> отображени<text:span text:style-name="T21">я</text:span> текущего состояния выходов <text:s/>с помощью светодиодов.</text:p>
      <text:p text:style-name="P13">Устройство имеет автономное питание от батареи 4.5В.</text:p>
      <text:p text:style-name="P27"><text:line-break/></text:p>
      <text:p text:style-name="P44">1.4. Расчет номиналов элементов схемы.</text:p>
      <text:p text:style-name="P45">Формула: (<text:span text:style-name="T20">Vcc – V</text:span><text:span text:style-name="T22">пит) / </text:span><text:span text:style-name="T20">I</text:span><text:span text:style-name="T22">пт</text:span></text:p>
      <text:p text:style-name="P45"><text:span text:style-name="T22">Примерный ток: 0,01 А</text:span></text:p>
      <text:p text:style-name="P44"><text:span text:style-name="Strong_20_Emphasis"><text:span text:style-name="T11">D1–D3</text:span></text:span><text:span text:style-name="T11">: Резисторы R1, R2. Расчёт: (3,7 – 2) / 0.01 = 170 Ом. Установленный номинал: </text:span><text:span text:style-name="Strong_20_Emphasis"><text:span text:style-name="T11">220 Ом</text:span></text:span><text:span text:style-name="T11">. Ток через LED: ~7.7 мА. </text:span></text:p>
      <text:p text:style-name="Text_20_body"><text:span text:style-name="Strong_20_Emphasis"><text:span text:style-name="T23">D4</text:span></text:span><text:span text:style-name="T23">: </text:span><text:span text:style-name="T24">Резистор используется для общего предназначения</text:span><text:span text:style-name="T23">. </text:span><text:span text:style-name="T24">Используемый</text:span><text:span text:style-name="T23"> номинал: </text:span><text:span text:style-name="Strong_20_Emphasis"><text:span text:style-name="T23">220 Ом</text:span></text:span><text:span text:style-name="T23">. Ток через LED: ~7.7 мА. </text:span></text:p>
      <text:p text:style-name="Text_20_body"><text:span text:style-name="Strong_20_Emphasis"><text:span text:style-name="T23">D5</text:span></text:span><text:span text:style-name="T23">: Резистор R5. Расчёт: (3,7 – 2) / 0.01 = 170 Ом. </text:span><text:span text:style-name="T24">Используемый</text:span><text:span text:style-name="T23"> номинал: </text:span><text:span text:style-name="Strong_20_Emphasis"><text:span text:style-name="T23">1 кОм</text:span></text:span><text:span text:style-name="T23">. Ток через LED: ~1.7 мА. </text:span></text:p>
      <text:p text:style-name="Text_20_body"><text:span text:style-name="Strong_20_Emphasis"><text:span text:style-name="T23">D6</text:span></text:span><text:span text:style-name="T23">: Резистор R6. Расчёт: (3,7 – 2) / 0.01 = 170 Ом. </text:span><text:span text:style-name="T24">Используемый</text:span><text:span text:style-name="T23"> номинал: </text:span><text:span text:style-name="Strong_20_Emphasis"><text:span text:style-name="T23">220 Ом</text:span></text:span><text:span text:style-name="T23">. Ток через LED: ~7.7 мА. </text:span></text:p>
      <text:p text:style-name="Text_20_body"><text:soft-page-break/><text:span text:style-name="Strong_20_Emphasis"><text:span text:style-name="T23">D7</text:span></text:span><text:span text:style-name="T23">: Резистор R7. Расчёт: (3,7 – 2) / 0.01 = 170 Ом. </text:span><text:span text:style-name="T24">Используемый</text:span><text:span text:style-name="T23"> номинал: </text:span><text:span text:style-name="Strong_20_Emphasis"><text:span text:style-name="T23">220 Ом</text:span></text:span><text:span text:style-name="T23">. Ток через LED: ~7.7 мА. </text:span></text:p>
      <text:p text:style-name="Text_20_body"><text:span text:style-name="Strong_20_Emphasis"><text:span text:style-name="T23">D8</text:span></text:span><text:span text:style-name="T23">: Резистор R9. Расчёт: (3,7 – 2) / 0.01 = 170 Ом. Установленный номинал: </text:span><text:span text:style-name="Strong_20_Emphasis"><text:span text:style-name="T23">200 Ом</text:span></text:span><text:span text:style-name="T23">. Ток через LED: ~8.5 мА. </text:span></text:p>
      <text:p text:style-name="P27"/>
      <text:p text:style-name="P28"/>
      <text:p text:style-name="P14"/>
      <text:p text:style-name="P14"/>
      <text:p text:style-name="P14"/>
      <text:h text:style-name="P52" text:outline-level="2"><text:bookmark-start text:name="__RefHeading___Toc1880_2825539701"/>1.5. Перечень элементов.<text:bookmark-end text:name="__RefHeading___Toc1880_2825539701"/></text:h>
      <text:p text:style-name="P15">Здесь необходимо по шаблону заполнить таблицу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31">Поз. обозначение</text:p>
          </table:table-cell>
          <table:table-cell table:style-name="Таблица1.A1" office:value-type="string">
            <text:p text:style-name="P31">Наименование</text:p>
          </table:table-cell>
          <table:table-cell table:style-name="Таблица1.A1" office:value-type="string">
            <text:p text:style-name="P31">Кол.</text:p>
          </table:table-cell>
          <table:table-cell table:style-name="Таблица1.D1" office:value-type="string">
            <text:p text:style-name="P31">Примечание</text:p>
          </table:table-cell>
        </table:table-row>
        <table:table-row>
          <table:table-cell table:style-name="Таблица1.A2" office:value-type="string">
            <text:p text:style-name="P34"/>
          </table:table-cell>
          <table:table-cell table:style-name="Таблица1.A2" office:value-type="string">
            <text:p text:style-name="P31">Микросхемы</text:p>
          </table:table-cell>
          <table:table-cell table:style-name="Таблица1.A2" office:value-type="string">
            <text:p text:style-name="P34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31">U1</text:p>
          </table:table-cell>
          <table:table-cell table:style-name="Таблица1.A2" office:value-type="string">
            <text:p text:style-name="P35">74LS175</text:p>
          </table:table-cell>
          <table:table-cell table:style-name="Таблица1.A2" office:value-type="string">
            <text:p text:style-name="P31">1</text:p>
          </table:table-cell>
          <table:table-cell table:style-name="Таблица1.D2" office:value-type="string">
            <text:p text:style-name="P35">DIP-16</text:p>
          </table:table-cell>
        </table:table-row>
        <table:table-row>
          <table:table-cell table:style-name="Таблица1.A2" office:value-type="string">
            <text:p text:style-name="P34"/>
          </table:table-cell>
          <table:table-cell table:style-name="Таблица1.A2" office:value-type="string">
            <text:p text:style-name="P31">Резисторы</text:p>
          </table:table-cell>
          <table:table-cell table:style-name="Таблица1.A2" office:value-type="string">
            <text:p text:style-name="P34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31">R1-<text:span text:style-name="T14">R8</text:span></text:p>
          </table:table-cell>
          <table:table-cell table:style-name="Таблица1.A2" office:value-type="string">
            <text:p text:style-name="P32">0,25 <text:span text:style-name="T14">Вт</text:span> — <text:span text:style-name="T15">220</text:span> Ом <text:span text:style-name="T16">±</text:span><text:span text:style-name="T10">10%</text:span></text:p>
          </table:table-cell>
          <table:table-cell table:style-name="Таблица1.A2" office:value-type="string">
            <text:p text:style-name="P37">8</text:p>
          </table:table-cell>
          <table:table-cell table:style-name="Таблица1.D2" office:value-type="string">
            <text:p text:style-name="P39">SMD 12<text:span text:style-name="T15">06</text:span></text:p>
          </table:table-cell>
        </table:table-row>
        <table:table-row>
          <table:table-cell table:style-name="Таблица1.A2" office:value-type="string">
            <text:p text:style-name="P37">R9</text:p>
          </table:table-cell>
          <table:table-cell table:style-name="Таблица1.A2" office:value-type="string">
            <text:p text:style-name="P33">0,25 <text:span text:style-name="T14">Вт</text:span> — <text:span text:style-name="T15">220</text:span> Ом <text:span text:style-name="T16">±</text:span><text:span text:style-name="T10">10%</text:span></text:p>
          </table:table-cell>
          <table:table-cell table:style-name="Таблица1.A2" office:value-type="string">
            <text:p text:style-name="P37">1</text:p>
          </table:table-cell>
          <table:table-cell table:style-name="Таблица1.D2" office:value-type="string">
            <text:p text:style-name="P38">SMD 1206</text:p>
          </table:table-cell>
        </table:table-row>
        <table:table-row>
          <table:table-cell table:style-name="Таблица1.A2" office:value-type="string">
            <text:p text:style-name="P34"/>
          </table:table-cell>
          <table:table-cell table:style-name="Таблица1.A2" office:value-type="string">
            <text:p text:style-name="P37">Светодиоды</text:p>
          </table:table-cell>
          <table:table-cell table:style-name="Таблица1.A2" office:value-type="string">
            <text:p text:style-name="P34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37">LED 1- LED 8</text:p>
          </table:table-cell>
          <table:table-cell table:style-name="Таблица1.A2" office:value-type="string">
            <text:p text:style-name="P41"/>
          </table:table-cell>
          <table:table-cell table:style-name="Таблица1.A2" office:value-type="string">
            <text:p text:style-name="P36">8</text:p>
          </table:table-cell>
          <table:table-cell table:style-name="Таблица1.D2" office:value-type="string">
            <text:p text:style-name="P38">SMD 0805</text:p>
          </table:table-cell>
        </table:table-row>
        <table:table-row>
          <table:table-cell table:style-name="Таблица1.A2" office:value-type="string">
            <text:p text:style-name="P34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P34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34"/>
          </table:table-cell>
          <table:table-cell table:style-name="Таблица1.A2" office:value-type="string">
            <text:p text:style-name="P40">Источник питания</text:p>
          </table:table-cell>
          <table:table-cell table:style-name="Таблица1.A2" office:value-type="string">
            <text:p text:style-name="P34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40">BT1</text:p>
          </table:table-cell>
          <table:table-cell table:style-name="Таблица1.A2" office:value-type="string">
            <text:p text:style-name="P29">Батарейка 4,5 В</text:p>
          </table:table-cell>
          <table:table-cell table:style-name="Таблица1.A2" office:value-type="string">
            <text:p text:style-name="P40">1</text:p>
          </table:table-cell>
          <table:table-cell table:style-name="Таблица1.D2" office:value-type="string">
            <text:p text:style-name="P35">CR2032</text:p>
          </table:table-cell>
        </table:table-row>
        <table:table-row>
          <table:table-cell table:style-name="Таблица1.A2" office:value-type="string">
            <text:p text:style-name="P40"/>
          </table:table-cell>
          <table:table-cell table:style-name="Таблица1.A2" office:value-type="string">
            <text:p text:style-name="P30">Коммутационные изделия</text:p>
          </table:table-cell>
          <table:table-cell table:style-name="Таблица1.A2" office:value-type="string">
            <text:p text:style-name="P40"/>
          </table:table-cell>
          <table:table-cell table:style-name="Таблица1.D2" office:value-type="string">
            <text:p text:style-name="P35"/>
          </table:table-cell>
        </table:table-row>
        <table:table-row>
          <table:table-cell table:style-name="Таблица1.A2" office:value-type="string">
            <text:p text:style-name="P36">SW1-SW3</text:p>
          </table:table-cell>
          <table:table-cell table:style-name="Таблица1.A2" office:value-type="string">
            <text:p text:style-name="P29">Переключатель Nides Cas</text:p>
          </table:table-cell>
          <table:table-cell table:style-name="Таблица1.A2" office:value-type="string">
            <text:p text:style-name="P36">3</text:p>
          </table:table-cell>
          <table:table-cell table:style-name="Таблица1.D2" office:value-type="string">
            <text:p text:style-name="P35"/>
          </table:table-cell>
        </table:table-row>
        <table:table-row>
          <table:table-cell table:style-name="Таблица1.A2" office:value-type="string">
            <text:p text:style-name="P36">SW5</text:p>
          </table:table-cell>
          <table:table-cell table:style-name="Таблица1.A2" office:value-type="string">
            <text:p text:style-name="P29">Переключатель Nides Cas</text:p>
          </table:table-cell>
          <table:table-cell table:style-name="Таблица1.A2" office:value-type="string">
            <text:p text:style-name="P36">1</text:p>
          </table:table-cell>
          <table:table-cell table:style-name="Таблица1.D2" office:value-type="string">
            <text:p text:style-name="P35"/>
          </table:table-cell>
        </table:table-row>
        <table:table-row>
          <table:table-cell table:style-name="Таблица1.A2" office:value-type="string">
            <text:p text:style-name="P36">SW4</text:p>
          </table:table-cell>
          <table:table-cell table:style-name="Таблица1.A2" office:value-type="string">
            <text:p text:style-name="P29">Тактовая кнопка KLS-1235LP20</text:p>
          </table:table-cell>
          <table:table-cell table:style-name="Таблица1.A2" office:value-type="string">
            <text:p text:style-name="P36">1</text:p>
          </table:table-cell>
          <table:table-cell table:style-name="Таблица1.D2" office:value-type="string">
            <text:p text:style-name="P35"/>
          </table:table-cell>
        </table:table-row>
      </table:table>
      <text:p text:style-name="P16"/>
      <text:p text:style-name="P16"/>
      <text:p text:style-name="P16"/>
      <text:h text:style-name="P56" text:outline-level="1"><text:bookmark-start text:name="__RefHeading___Toc1257_2825539701"/>2. Конструкторский раздел<text:bookmark-end text:name="__RefHeading___Toc1257_2825539701"/></text:h>
      <text:h text:style-name="P51" text:outline-level="2"><text:bookmark-start text:name="__RefHeading___Toc1979_2825539701"/>2.1. Разработка принципиальной схемы в САПР KiCAD.<text:bookmark-end text:name="__RefHeading___Toc1979_2825539701"/></text:h>
      <text:p text:style-name="P17">Здесь необходимо привести скриншот принципиальной схемы из KiCAD.</text:p>
      <text:p text:style-name="P17"/>
      <text:p text:style-name="P17"/>
      <text:p text:style-name="P17"><draw:frame draw:style-name="fr1" draw:name="Изображение1" text:anchor-type="char" svg:x="1.069cm" svg:y="-0.263cm" svg:width="14.432cm" svg:height="10.139cm" draw:z-index="2"><draw:image xlink:href="Pictures/100000000000068E0000049B330F61CE.png" xlink:type="simple" xlink:show="embed" xlink:actuate="onLoad"/></draw:frame></text:p>
      <text:h text:style-name="P53" text:outline-level="2"><text:bookmark-start text:name="__RefHeading___Toc1981_2825539701"/>2.2. Чертежи печатной платы <text:span text:style-name="T17">в САПР KiCAD</text:span>.<text:bookmark-end text:name="__RefHeading___Toc1981_2825539701"/></text:h>
      <text:p text:style-name="P18">Здесь необходимо отдельно привести скриншоты из KiCAD:</text:p>
      <text:p text:style-name="P18">- верхнего медного слоя;</text:p>
      <text:p text:style-name="P18"><draw:frame draw:style-name="fr2" draw:name="Изображение2" text:anchor-type="char" svg:width="13.025cm" svg:height="12.386cm" draw:z-index="3"><draw:image xlink:href="Pictures/10000000000003E8000003B6BE517AC5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- нижнего медного слоя;</text:p>
      <text:p text:style-name="P18"><draw:frame draw:style-name="fr2" draw:name="Изображение3" text:anchor-type="char" svg:width="11.047cm" svg:height="10.34cm" draw:z-index="4"><draw:image xlink:href="Pictures/10000000000003660000039B8BA9A514.png" xlink:type="simple" xlink:show="embed" xlink:actuate="onLoad"/></draw:frame></text:p>
      <text:p text:style-name="P18"/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- верхний слой паяльной маски;</text:p>
      <text:p text:style-name="P19"><draw:frame draw:style-name="fr2" draw:name="Изображение4" text:anchor-type="char" svg:width="11.324cm" svg:height="11.155cm" draw:z-index="5"><draw:image xlink:href="Pictures/10000000000003E7000003D88D89A2D8.png" xlink:type="simple" xlink:show="embed" xlink:actuate="onLoad"/></draw:frame></text:p>
      <text:p text:style-name="P19"/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- <text:span text:style-name="T18">нижний</text:span> слой паяльной маски;</text:p>
      <text:p text:style-name="P18"><draw:frame draw:style-name="fr2" draw:name="Изображение5" text:anchor-type="char" svg:width="9.158cm" svg:height="9.269cm" draw:z-index="6"><draw:image xlink:href="Pictures/10000000000003D2000003DE9435DFC5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- <text:span text:style-name="T18">верхний слой шелкографии;</text:span></text:p>
      <text:p text:style-name="P18"><draw:frame draw:style-name="fr2" draw:name="Изображение6" text:anchor-type="char" svg:width="9.294cm" svg:height="9.013cm" draw:z-index="7"><draw:image xlink:href="Pictures/10000000000003E2000003C4675242AA.png" xlink:type="simple" xlink:show="embed" xlink:actuate="onLoad"/></draw:frame></text:p>
      <text:p text:style-name="P18"/>
      <text:p text:style-name="P18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- нижний слой шелкографии.</text:p>
      <text:p text:style-name="P20"><draw:frame draw:style-name="fr2" draw:name="Изображение7" text:anchor-type="char" svg:width="10.269cm" svg:height="10.134cm" draw:z-index="8"><draw:image xlink:href="Pictures/10000000000003D9000003CC1AE84DA4.png" xlink:type="simple" xlink:show="embed" xlink:actuate="onLoad"/></draw:frame></text:p>
      <text:p text:style-name="P20"/>
      <text:p text:style-name="P20"/>
      <text:p text:style-name="P20"/>
      <text:h text:style-name="P54" text:outline-level="2"><text:bookmark-start text:name="__RefHeading___Toc1983_2825539701"/>2.3. Чертеж общего вида <text:span text:style-name="T19">в САПР KiCAD</text:span>.<text:bookmark-end text:name="__RefHeading___Toc1983_2825539701"/></text:h>
      <text:p text:style-name="P21">Здесь необходимо привести скриншоты из KiCAD 3D модели:</text:p>
      <text:p text:style-name="P21">- вид сверху;</text:p>
      <text:p text:style-name="P21"><draw:frame draw:style-name="fr2" draw:name="Изображение8" text:anchor-type="char" svg:width="11.225cm" svg:height="11.109cm" draw:z-index="9"><draw:image xlink:href="Pictures/10000000000004F4000004E7426B5B32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- вид спереди;</text:p>
      <text:p text:style-name="P21"><draw:frame draw:style-name="fr3" draw:name="Изображение9" text:anchor-type="char" svg:width="17.002cm" svg:height="3.286cm" draw:z-index="0"><draw:image xlink:href="Pictures/10000000000005920000009CBDD1F8D6.png" xlink:type="simple" xlink:show="embed" xlink:actuate="onLoad"/></draw:frame></text:p>
      <text:p text:style-name="P21"/>
      <text:p text:style-name="P21"/>
      <text:p text:style-name="P21"/>
      <text:p text:style-name="P21"/>
      <text:p text:style-name="P21"><text:soft-page-break/>- вид сбоку;</text:p>
      <text:p text:style-name="P21"><draw:frame draw:style-name="fr2" draw:name="Изображение10" text:anchor-type="char" svg:width="4.576cm" svg:height="16.164cm" draw:z-index="1"><draw:image xlink:href="Pictures/10000000000000A500000465041940CA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- изометрическая проекция.</text:p>
      <text:p text:style-name="P21"><draw:frame draw:style-name="fr4" draw:name="Изображение11" text:anchor-type="char" svg:width="12.511cm" svg:height="11.352cm" draw:z-index="10"><draw:image xlink:href="Pictures/100000000000035500000306E78F680A.png" xlink:type="simple" xlink:show="embed" xlink:actuate="onLoad"/></draw:frame></text:p>
      <text:p text:style-name="P22"/>
      <text:p text:style-name="P22"/>
      <text:p text:style-name="P22"/>
      <text:p text:style-name="P23"/>
      <text:p text:style-name="P23"/>
      <text:p text:style-name="P23"/>
      <text:p text:style-name="P23"/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 Sans1" svg:font-family="'Open Sans', Arial, 'Helvetica CY', Helvetica, Roboto, 'Nimbus Sans L', sans-serif"/>
    <style:font-face style:name="system-ui" svg:font-family="system-ui, ui-sans-serif, apple-system, BlinkMacSystemFont, Inter, NotoSansHans, sans-serif"/>
    <style:font-face style:name="Times new roman2" svg:font-family="'Times new roman'" style:font-family-generic="roman"/>
    <style:font-face style:name="Times new roman1" svg:font-family="'Times new roman'" style:font-adornments="Жирный" style:font-family-generic="roman"/>
    <style:font-face style:name="Times new roman" svg:font-family="'Times new roman'" style:font-adornments="Обычный" style:font-family-generic="roman"/>
    <style:font-face style:name="Droid Sans1" svg:font-family="'Droid Sans'" style:font-family-generic="swiss"/>
    <style:font-face style:name="Open Sans2" svg:font-family="'Open Sans'" style:font-adornments="Обычный" style:font-family-generic="swiss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Обычный" style:font-family-generic="roman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/>
    </style:style>
    <style:style style:name="List" style:family="paragraph" style:parent-style-name="Text_20_body" style:class="list">
      <style:text-properties style:font-size-asian="12pt" style:font-name-complex="Droid Sans1" style:font-family-complex="'Droid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1" style:font-family-complex="'Droid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1" style:font-family-complex="'Droid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text:number-lines="false" text:line-number="0"/>
      <style:text-properties style:font-name="Times new roman1" fo:font-family="'Times new roman'" style:font-style-name="Жирный" style:font-family-generic="roman" fo:font-size="16pt" fo:font-weight="bold" style:font-size-asian="16pt" style:font-weight-asian="bold" style:font-size-complex="16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line-height="150%" fo:text-indent="1.499cm" style:auto-text-indent="false"/>
      <style:text-properties style:font-name="Times new roman1" fo:font-family="'Times new roman'" style:font-style-name="Жирный" style:font-family-generic="roman" fo:font-size="18pt" fo:font-weight="bold" style:font-size-asian="18pt" style:font-weight-asian="bold" style:font-size-complex="18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loext:contextual-spacing="false" fo:line-height="150%" fo:text-indent="1.499cm" style:auto-text-indent="false"/>
      <style:text-properties style:font-name="Times new roman" fo:font-family="'Times new roman'" style:font-style-name="Обычный" style:font-family-generic="roman" fo:font-size="16pt" fo:font-weight="normal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line-height="150%"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Droid Sans" style:font-family-complex="'Droid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family-generic-asian="system" style:font-pitch-asian="variable" style:font-size-asian="12pt" style:font-weight-asian="bold" style:font-name-complex="Droid Sans" style:font-family-complex="'Droid Sans'" style:font-family-generic-complex="system" style:font-pitch-complex="variable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bookmark-start text:name="PageNumWizard_FOOTER_Базовый1"/><text:page-number text:select-page="current">12</text:page-number><text:bookmark-end text:name="PageNumWizard_FOOTER_Базовый1"/></text:p>
      </style:footer>
    </style:master-page>
    <style:master-page style:name="First_20_Page" style:display-name="First Page" style:page-layout-name="Mpm2" style:next-style-name="Standard">
      <style:footer>
        <text:p text:style-name="MP1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5-01T14:09:06.063133719</meta:creation-date>
    <meta:generator>LibreOffice/4.4.5.2$Windows_x86 LibreOffice_project/a22f674fd25a3b6f45bdebf25400ed2adff0ff99</meta:generator>
    <dc:date>2026-06-09T19:33:13.214000000</dc:date>
    <meta:editing-duration>PT2H22S</meta:editing-duration>
    <meta:editing-cycles>34</meta:editing-cycles>
    <meta:document-statistic meta:table-count="1" meta:image-count="11" meta:object-count="0" meta:page-count="14" meta:paragraph-count="114" meta:word-count="639" meta:character-count="4372" meta:non-whitespace-character-count="3825"/>
  </office:meta>
</office:document-meta>
</file>