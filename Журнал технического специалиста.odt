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500000306638B385D.png" manifest:media-type="image/png"/>
  <manifest:file-entry manifest:full-path="Pictures/10000000000004F4000004E74CA4DA3B.png" manifest:media-type="image/png"/>
  <manifest:file-entry manifest:full-path="Pictures/10000000000003D9000003CC48B01F5D.png" manifest:media-type="image/png"/>
  <manifest:file-entry manifest:full-path="Pictures/10000000000005920000009C5C98DDF0.png" manifest:media-type="image/png"/>
  <manifest:file-entry manifest:full-path="Pictures/10000000000003D2000003DEF9DA302C.png" manifest:media-type="image/png"/>
  <manifest:file-entry manifest:full-path="Pictures/10000000000003E7000003D800A482A2.png" manifest:media-type="image/png"/>
  <manifest:file-entry manifest:full-path="Pictures/10000000000003660000039BD3FFE950.png" manifest:media-type="image/png"/>
  <manifest:file-entry manifest:full-path="Pictures/10000000000003E8000003B6429E944D.png" manifest:media-type="image/png"/>
  <manifest:file-entry manifest:full-path="Pictures/10000000000000A500000465F751BE02.png" manifest:media-type="image/png"/>
  <manifest:file-entry manifest:full-path="Pictures/10000000000003E2000003C4D6A22EBA.png" manifest:media-type="image/png"/>
  <manifest:file-entry manifest:full-path="Pictures/100000000000068E0000049B4F2270E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Обычный" style:font-family-generic="swiss"/>
    <style:font-face style:name="Open Sans2" svg:font-family="'Open Sans', Arial, 'Helvetica CY', Helvetica, Roboto, 'Nimbus Sans L', sans-serif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adornments="Жирный" style:font-family-generic="roman"/>
    <style:font-face style:name="Times new roman2" svg:font-family="'Times new roman'" style:font-adornments="Обычный" style:font-family-generic="roman"/>
    <style:font-face style:name="system-ui" svg:font-family="system-ui, ui-sans-serif, apple-system, BlinkMacSystemFont, Inter, NotoSansHans, sans-serif"/>
  </office:font-face-decls>
  <office:automatic-styles>
    <style:style style:name="Таблица1" style:family="table">
      <style:table-properties style:width="17.002cm" table:align="margins"/>
    </style:style>
    <style:style style:name="Таблица1.A" style:family="table-column">
      <style:table-column-properties style:column-width="2.893cm" style:rel-column-width="11150*"/>
    </style:style>
    <style:style style:name="Таблица1.B" style:family="table-column">
      <style:table-column-properties style:column-width="8.698cm" style:rel-column-width="33525*"/>
    </style:style>
    <style:style style:name="Таблица1.C" style:family="table-column">
      <style:table-column-properties style:column-width="1.159cm" style:rel-column-width="4466*"/>
    </style:style>
    <style:style style:name="Таблица1.D" style:family="table-column">
      <style:table-column-properties style:column-width="4.253cm" style:rel-column-width="16394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" fo:font-size="18pt" fo:font-weight="bold" officeooo:rsid="00260f34" officeooo:paragraph-rsid="00260f34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8pt" fo:font-weight="bold" officeooo:rsid="000c7e59" officeooo:paragraph-rsid="000c7e59" style:font-size-asian="18pt" style:font-weight-asian="bold" style:font-size-complex="18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8pt" fo:font-weight="bold" officeooo:rsid="000c7e59" officeooo:paragraph-rsid="000c7e59" style:font-size-asian="18pt" style:font-weight-asian="bold" style:font-size-complex="18pt" style:font-weight-complex="bold"/>
    </style:style>
    <style:style style:name="P4" style:family="paragraph" style:parent-style-name="Contents_20_Heading" style:master-page-name="Index">
      <style:paragraph-properties style:page-number="auto" fo:break-before="page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officeooo:paragraph-rsid="000c7e59"/>
    </style:style>
    <style:style style:name="P8" style:family="paragraph" style:parent-style-name="Standard">
      <style:paragraph-properties fo:line-height="150%"/>
      <style:text-properties style:font-name="Times new roman"/>
    </style:style>
    <style:style style:name="P9" style:family="paragraph" style:parent-style-name="Heading_20_1" style:master-page-name="Standard">
      <style:paragraph-properties style:page-number="1" fo:break-before="page"/>
      <style:text-properties officeooo:rsid="00137e76" officeooo:paragraph-rsid="00137e76"/>
    </style:style>
    <style:style style:name="P10" style:family="paragraph" style:parent-style-name="Heading_20_2">
      <style:text-properties officeooo:rsid="00137e76" officeooo:paragraph-rsid="00137e76"/>
    </style:style>
    <style:style style:name="P11" style:family="paragraph" style:parent-style-name="Text_20_body">
      <style:paragraph-properties fo:text-align="justify" style:justify-single-word="false"/>
      <style:text-properties officeooo:rsid="00284aac" officeooo:paragraph-rsid="00284aac"/>
    </style:style>
    <style:style style:name="P12" style:family="paragraph" style:parent-style-name="Text_20_body">
      <style:paragraph-properties fo:text-align="justify" style:justify-single-word="false"/>
      <style:text-properties officeooo:paragraph-rsid="00284aac"/>
    </style:style>
    <style:style style:name="P13" style:family="paragraph" style:parent-style-name="Text_20_body">
      <style:paragraph-properties fo:text-align="justify" style:justify-single-word="false"/>
      <style:text-properties officeooo:rsid="0031e8ba" officeooo:paragraph-rsid="0031e8ba"/>
    </style:style>
    <style:style style:name="P14" style:family="paragraph" style:parent-style-name="Text_20_body">
      <style:paragraph-properties fo:text-align="justify" style:justify-single-word="false"/>
      <style:text-properties officeooo:rsid="0015c508" officeooo:paragraph-rsid="00284aac"/>
    </style:style>
    <style:style style:name="P15" style:family="paragraph" style:parent-style-name="Standard">
      <style:text-properties fo:font-variant="normal" fo:text-transform="none" fo:color="#1d1d1f" loext:opacity="100%" style:font-name="system-ui" fo:font-size="12pt" fo:letter-spacing="normal" fo:font-style="normal" fo:font-weight="normal" officeooo:rsid="0015c508" officeooo:paragraph-rsid="0015c508" loext:padding="0cm" loext:border="none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</style:style>
    <style:style style:name="P1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3218be"/>
    </style:style>
    <style:style style:name="P1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9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3218be"/>
    </style:style>
    <style:style style:name="P20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1" style:family="paragraph" style:parent-style-name="Heading_20_2">
      <style:text-properties officeooo:rsid="0017b272" officeooo:paragraph-rsid="0017b272"/>
    </style:style>
    <style:style style:name="P22" style:family="paragraph" style:parent-style-name="Text_20_body">
      <style:text-properties officeooo:rsid="0017b272" officeooo:paragraph-rsid="0017b272"/>
    </style:style>
    <style:style style:name="P23" style:family="paragraph" style:parent-style-name="Text_20_body">
      <style:text-properties fo:font-variant="normal" fo:text-transform="none" fo:color="#1d1d1f" loext:opacity="100%" style:font-name="system-ui" fo:font-size="12pt" fo:letter-spacing="normal" fo:font-style="normal" fo:font-weight="normal" officeooo:paragraph-rsid="0017b272" style:font-weight-asian="normal" style:font-weight-complex="normal" loext:padding="0cm" loext:border="none"/>
    </style:style>
    <style:style style:name="P24" style:family="paragraph" style:parent-style-name="Text_20_body">
      <style:paragraph-properties fo:margin-left="0cm" fo:margin-right="0cm" fo:text-indent="0cm" style:auto-text-indent="false"/>
    </style:style>
    <style:style style:name="P25" style:family="paragraph" style:parent-style-name="Text_20_body">
      <style:text-properties officeooo:paragraph-rsid="00284aac"/>
    </style:style>
    <style:style style:name="P26" style:family="paragraph" style:parent-style-name="Text_20_body">
      <style:text-properties style:font-name="Times new roman2" fo:font-size="14pt" officeooo:rsid="0017b272" officeooo:paragraph-rsid="00284aac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rsid="001824f2"/>
    </style:style>
    <style:style style:name="P28" style:family="paragraph" style:parent-style-name="Text_20_body">
      <style:text-properties officeooo:rsid="001824f2" officeooo:paragraph-rsid="001824f2"/>
    </style:style>
    <style:style style:name="P29" style:family="paragraph" style:parent-style-name="Heading_20_2">
      <style:paragraph-properties fo:break-before="page"/>
      <style:text-properties officeooo:rsid="0018e866" officeooo:paragraph-rsid="0018e866"/>
    </style:style>
    <style:style style:name="P30" style:family="paragraph" style:parent-style-name="Text_20_body">
      <style:text-properties officeooo:rsid="001ae71c" officeooo:paragraph-rsid="001ae71c"/>
    </style:style>
    <style:style style:name="P31" style:family="paragraph" style:parent-style-name="Table_20_Contents">
      <style:paragraph-properties fo:text-align="center" style:justify-single-word="false"/>
      <style:text-properties officeooo:rsid="001ae71c" officeooo:paragraph-rsid="001ae71c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text-properties officeooo:rsid="0035dc69" officeooo:paragraph-rsid="0035dc69"/>
    </style:style>
    <style:style style:name="P34" style:family="paragraph" style:parent-style-name="Table_20_Contents">
      <style:text-properties officeooo:rsid="001ae71c" officeooo:paragraph-rsid="001ae71c"/>
    </style:style>
    <style:style style:name="P35" style:family="paragraph" style:parent-style-name="Table_20_Contents">
      <style:paragraph-properties fo:text-align="center" style:justify-single-word="false"/>
      <style:text-properties officeooo:rsid="003403dd" officeooo:paragraph-rsid="003403dd"/>
    </style:style>
    <style:style style:name="P36" style:family="paragraph" style:parent-style-name="Table_20_Contents">
      <style:text-properties officeooo:rsid="0029ccd8" officeooo:paragraph-rsid="0029ccd8"/>
    </style:style>
    <style:style style:name="P37" style:family="paragraph" style:parent-style-name="Table_20_Contents">
      <style:text-properties officeooo:rsid="001ae71c" officeooo:paragraph-rsid="003403dd"/>
    </style:style>
    <style:style style:name="P38" style:family="paragraph" style:parent-style-name="Table_20_Contents">
      <style:text-properties officeooo:rsid="003403dd" officeooo:paragraph-rsid="003403dd"/>
    </style:style>
    <style:style style:name="P39" style:family="paragraph" style:parent-style-name="Table_20_Contents">
      <style:text-properties officeooo:paragraph-rsid="001b0c53"/>
    </style:style>
    <style:style style:name="P40" style:family="paragraph" style:parent-style-name="Table_20_Contents">
      <style:paragraph-properties fo:text-align="center" style:justify-single-word="false"/>
      <style:text-properties officeooo:rsid="0035dc69" officeooo:paragraph-rsid="0035dc69"/>
    </style:style>
    <style:style style:name="P41" style:family="paragraph" style:parent-style-name="Table_20_Contents">
      <style:paragraph-properties fo:text-align="center" style:justify-single-word="false"/>
      <style:text-properties officeooo:rsid="0029ccd8" officeooo:paragraph-rsid="0029ccd8"/>
    </style:style>
    <style:style style:name="P42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Open Sans2" fo:font-size="12pt" fo:letter-spacing="normal" fo:font-style="normal" fo:font-weight="normal" officeooo:rsid="0035dc69" officeooo:paragraph-rsid="0035dc69" style:font-size-asian="12pt" style:font-weight-asian="normal" style:font-size-complex="12pt" style:font-weight-complex="normal"/>
    </style:style>
    <style:style style:name="P43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Open Sans2" fo:font-size="12pt" fo:letter-spacing="normal" fo:font-style="normal" fo:font-weight="normal" officeooo:rsid="0035dc69" officeooo:paragraph-rsid="0035dc69" style:font-size-asian="12pt" style:font-weight-asian="normal" style:font-size-complex="12pt" style:font-weight-complex="normal"/>
    </style:style>
    <style:style style:name="P44" style:family="paragraph" style:parent-style-name="Text_20_body">
      <style:text-properties officeooo:paragraph-rsid="0018e866"/>
    </style:style>
    <style:style style:name="P45" style:family="paragraph" style:parent-style-name="Heading_20_1">
      <style:paragraph-properties fo:break-before="page"/>
      <style:text-properties officeooo:rsid="00137e76" officeooo:paragraph-rsid="00137e76"/>
    </style:style>
    <style:style style:name="P46" style:family="paragraph" style:parent-style-name="Heading_20_2">
      <style:text-properties officeooo:rsid="001ed1cf" officeooo:paragraph-rsid="001ed1cf"/>
    </style:style>
    <style:style style:name="P47" style:family="paragraph" style:parent-style-name="Text_20_body">
      <style:text-properties officeooo:rsid="001ed1cf" officeooo:paragraph-rsid="001ed1cf"/>
    </style:style>
    <style:style style:name="P48" style:family="paragraph" style:parent-style-name="Heading_20_2">
      <style:paragraph-properties fo:break-before="page"/>
      <style:text-properties officeooo:rsid="001f2e2e" officeooo:paragraph-rsid="001f2e2e"/>
    </style:style>
    <style:style style:name="P49" style:family="paragraph" style:parent-style-name="Text_20_body">
      <style:text-properties officeooo:rsid="001f2e2e" officeooo:paragraph-rsid="001f2e2e"/>
    </style:style>
    <style:style style:name="P50" style:family="paragraph" style:parent-style-name="Text_20_body">
      <style:text-properties officeooo:rsid="001f2e2e" officeooo:paragraph-rsid="0020b230"/>
    </style:style>
    <style:style style:name="P51" style:family="paragraph" style:parent-style-name="Text_20_body">
      <style:text-properties officeooo:rsid="0020b230" officeooo:paragraph-rsid="0020b230"/>
    </style:style>
    <style:style style:name="P52" style:family="paragraph" style:parent-style-name="Heading_20_2">
      <style:paragraph-properties fo:break-before="page"/>
      <style:text-properties officeooo:rsid="002241a4" officeooo:paragraph-rsid="002241a4"/>
    </style:style>
    <style:style style:name="P53" style:family="paragraph" style:parent-style-name="Text_20_body">
      <style:text-properties officeooo:rsid="002241a4" officeooo:paragraph-rsid="002241a4"/>
    </style:style>
    <style:style style:name="P54" style:family="paragraph" style:parent-style-name="Text_20_body">
      <style:text-properties officeooo:paragraph-rsid="001ed1cf"/>
    </style:style>
    <style:style style:name="P55" style:family="paragraph" style:parent-style-name="Text_20_body">
      <style:text-properties officeooo:paragraph-rsid="00137e76"/>
    </style:style>
    <style:style style:name="T1" style:family="text">
      <style:text-properties officeooo:rsid="002ff97e"/>
    </style:style>
    <style:style style:name="T2" style:family="text">
      <style:text-properties fo:font-size="18pt" fo:font-weight="bold" officeooo:rsid="000c7e59" style:font-size-asian="18pt" style:font-weight-asian="bold" style:font-size-complex="18pt" style:font-weight-complex="bold"/>
    </style:style>
    <style:style style:name="T3" style:family="text">
      <style:text-properties officeooo:rsid="001560c5"/>
    </style:style>
    <style:style style:name="T4" style:family="text">
      <style:text-properties officeooo:rsid="00284aac"/>
    </style:style>
    <style:style style:name="T5" style:family="text">
      <style:text-properties officeooo:rsid="0031e8ba"/>
    </style:style>
    <style:style style:name="T6" style:family="text">
      <style:text-properties fo:font-variant="normal" fo:text-transform="none" fo:color="#1d1d1f" loext:opacity="100%" style:font-name="system-ui" fo:font-size="12pt" fo:letter-spacing="normal" fo:font-style="normal" fo:font-weight="normal" style:font-weight-asian="normal" style:font-weight-complex="normal" loext:padding="0cm" loext:border="none"/>
    </style:style>
    <style:style style:name="T7" style:family="text">
      <style:text-properties fo:font-variant="normal" fo:text-transform="none" fo:color="#1d1d1f" loext:opacity="100%" style:font-name="system-ui" fo:font-size="12pt" fo:letter-spacing="normal" fo:font-style="normal" fo:font-weight="normal" officeooo:rsid="003218be" style:font-weight-asian="normal" style:font-weight-complex="normal" loext:padding="0cm" loext:border="none"/>
    </style:style>
    <style:style style:name="T8" style:family="text">
      <style:text-properties fo:font-variant="normal" fo:text-transform="none" fo:color="#1d1d1f" loext:opacity="100%" style:font-name="system-ui" fo:font-size="12pt" fo:letter-spacing="normal" fo:font-style="normal" fo:font-weight="normal" loext:padding="0cm" loext:border="none"/>
    </style:style>
    <style:style style:name="T9" style:family="text">
      <style:text-properties style:font-name="Times new roman2" fo:font-size="14pt" officeooo:rsid="0017b272"/>
    </style:style>
    <style:style style:name="T10" style:family="text">
      <style:text-properties officeooo:rsid="0029ccd8"/>
    </style:style>
    <style:style style:name="T11" style:family="text">
      <style:text-properties officeooo:rsid="003403dd"/>
    </style:style>
    <style:style style:name="T12" style:family="text">
      <style:text-properties style:font-name="Open Sans1"/>
    </style:style>
    <style:style style:name="T13" style:family="text">
      <style:text-properties style:font-name="Times new roman2"/>
    </style:style>
    <style:style style:name="T14" style:family="text">
      <style:text-properties officeooo:rsid="00238aad"/>
    </style:style>
    <style:style style:name="T15" style:family="text">
      <style:text-properties officeooo:rsid="0020b230"/>
    </style:style>
    <style:style style:name="T16" style:family="text">
      <style:text-properties officeooo:rsid="00242e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1.25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осударственное бюджетное профессиональное образовательное учреждение Астраханской области «Астраханский колледж вычислительной техники»</text:p>
      <text:p text:style-name="P2">Государственная итоговая аттестация</text:p>
      <text:p text:style-name="P2">Демонстрационный экзамен</text:p>
      <text:p text:style-name="P2">Базовый уровень</text:p>
      <text:p text:style-name="P2"/>
      <text:p text:style-name="P2"/>
      <text:p text:style-name="P2"/>
      <text:p text:style-name="P2">ЖУРНАЛ ТЕХНИЧЕСКОГО СПЕЦИАЛИСТА</text:p>
      <text:p text:style-name="P2"/>
      <text:p text:style-name="P2">09.02.01 Компьютерные системы и комплексы</text:p>
      <text:p text:style-name="P2">Специалист по компьютерным системам</text:p>
      <text:p text:style-name="P2"/>
      <text:p text:style-name="P2"/>
      <text:p text:style-name="P2"/>
      <text:p text:style-name="P3">Выпускник:<text:tab/><text:tab/><text:tab/><text:tab/><text:tab/><text:tab/><text:tab/><text:tab/><text:span text:style-name="T1">Янченко Д.В.</text:span></text:p>
      <text:p text:style-name="P2"/>
      <text:p text:style-name="P2"/>
      <text:p text:style-name="P2"/>
      <text:p text:style-name="P2"/>
      <text:p text:style-name="P2">2026 год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4">Содержание</text:p>
          </text:index-title>
          <text:p text:style-name="P5"><text:a xlink:type="simple" xlink:href="#__RefHeading___Toc1127_2825539701" text:style-name="Index_20_Link" text:visited-style-name="Index_20_Link">1. Схемотехнический раздел<text:tab/>1</text:a></text:p>
          <text:p text:style-name="P6"><text:a xlink:type="simple" xlink:href="#__RefHeading___Toc1519_2825539701" text:style-name="Index_20_Link" text:visited-style-name="Index_20_Link">1.1. Анализ задания на проектирование.<text:tab/>1</text:a></text:p>
          <text:p text:style-name="P6"><text:a xlink:type="simple" xlink:href="#__RefHeading___Toc1727_2825539701" text:style-name="Index_20_Link" text:visited-style-name="Index_20_Link">1.3. Описание схемы электрической принципиальной.<text:tab/>2</text:a></text:p>
          <text:p text:style-name="P6"><text:a xlink:type="simple" xlink:href="#__RefHeading___Toc1880_2825539701" text:style-name="Index_20_Link" text:visited-style-name="Index_20_Link">1.5. Перечень элементов.<text:tab/>4</text:a></text:p>
          <text:p text:style-name="P5"><text:a xlink:type="simple" xlink:href="#__RefHeading___Toc1257_2825539701" text:style-name="Index_20_Link" text:visited-style-name="Index_20_Link">2. Конструкторский раздел<text:tab/>5</text:a></text:p>
          <text:p text:style-name="P6"><text:a xlink:type="simple" xlink:href="#__RefHeading___Toc1979_2825539701" text:style-name="Index_20_Link" text:visited-style-name="Index_20_Link">2.1. Разработка принципиальной схемы в САПР KiCAD.<text:tab/>5</text:a></text:p>
          <text:p text:style-name="P6"><text:a xlink:type="simple" xlink:href="#__RefHeading___Toc1981_2825539701" text:style-name="Index_20_Link" text:visited-style-name="Index_20_Link">2.2. Чертежи печатной платы в САПР KiCAD.<text:tab/>6</text:a></text:p>
          <text:p text:style-name="P6"><text:a xlink:type="simple" xlink:href="#__RefHeading___Toc1983_2825539701" text:style-name="Index_20_Link" text:visited-style-name="Index_20_Link">2.3. Чертеж общего вида в САПР KiCAD.<text:tab/>10</text:a></text:p>
        </text:index-body>
      </text:table-of-content>
      <text:p text:style-name="P7"><text:span text:style-name="T2"/></text:p>
      <text:p text:style-name="P8"/>
      <text:h text:style-name="P9" text:outline-level="1"><text:bookmark-start text:name="__RefHeading___Toc1127_2825539701"/>1. Схемотехнический раздел<text:bookmark-end text:name="__RefHeading___Toc1127_2825539701"/></text:h>
      <text:h text:style-name="P10" text:outline-level="2"><text:bookmark-start text:name="__RefHeading___Toc1519_2825539701"/>1.1. <text:span text:style-name="T3">Анализ задания на проектирование.</text:span><text:bookmark-end text:name="__RefHeading___Toc1519_2825539701"/></text:h>
      <text:p text:style-name="P11">Разработка устройства включает себя, разработку электрической принципиальной схемы, трассировку печатной платы, создание 3Д модели.</text:p>
      <text:p text:style-name="P12"><text:span text:style-name="T4">Устройства имеет микросхемы: </text:span><text:span text:style-name="T5">две пары D-триггера, 74LS175. Пассивные элементы: 9 резисторов, номиналом 220 Ом и 1 кОм;</text:span></text:p>
      <text:p text:style-name="P13">Источник питания номиналом в 5 В;</text:p>
      <text:p text:style-name="P13">4 переключателя;</text:p>
      <text:p text:style-name="P13">8 красных светодиодов;</text:p>
      <text:p text:style-name="P13">1 тактовая кнопка.</text:p>
      <text:p text:style-name="P12"/>
      <text:p text:style-name="P14">1.2. Описание примененных компонентов.</text:p>
      <text:p text:style-name="P15">Ниже приведено описание всех компонентов, использованных в схеме, с указанием их технических характеристик, внешнего вида и типа корпуса.</text:p>
      <text:p text:style-name="P15"/>
      <text:p text:style-name="P16"><text:span text:style-name="Strong_20_Emphasis"><text:span text:style-name="T6">U1 (74LS175)</text:span></text:span><text:span text:style-name="T6">: Микросхема, содержащая четыре D-триггера. </text:span><text:span text:style-name="Emphasis"><text:span text:style-name="T6">Корпус:</text:span></text:span><text:span text:style-name="T6"> DIP-16 (выводной, шаг 7.62 мм).</text:span></text:p>
      <text:p text:style-name="P17"><text:span text:style-name="Strong_20_Emphasis"><text:span text:style-name="T6">BT1</text:span></text:span><text:span text:style-name="T6">: </text:span><text:span text:style-name="T7">и</text:span><text:span text:style-name="T6">сточник питания. </text:span><text:span text:style-name="T7">Б</text:span><text:span text:style-name="T6">атарея 4.5В. </text:span><text:span text:style-name="Emphasis"><text:span text:style-name="T6">Корпус:</text:span></text:span><text:span text:style-name="T6"> Держатель Keystone 500.</text:span></text:p>
      <text:p text:style-name="P18"><text:span text:style-name="Strong_20_Emphasis"><text:span text:style-name="T6">D1 – D8</text:span></text:span><text:span text:style-name="T6">: </text:span><text:span text:style-name="T7">с</text:span><text:span text:style-name="T6">ветодиоды (LED). </text:span><text:span text:style-name="Emphasis"><text:span text:style-name="T6">Корпус:</text:span></text:span><text:span text:style-name="T6"> SMD 0805 (2012 метрический).</text:span></text:p>
      <text:p text:style-name="P18"><text:span text:style-name="Strong_20_Emphasis"><text:span text:style-name="T6">R1 – R9</text:span></text:span><text:span text:style-name="T6">: </text:span><text:span text:style-name="T7">р</text:span><text:span text:style-name="T6">езисторы. Все компоненты в корпусе SMD 1206, рассчитанные на ручную пайку:</text:span></text:p>
      <text:list text:style-name="L1">
        <text:list-item>
          <text:list>
            <text:list-item>
              <text:p text:style-name="P19"><text:span text:style-name="Strong_20_Emphasis"><text:span text:style-name="T6">220 Ом:</text:span></text:span><text:span text:style-name="T6"> R1, R2, R3, R6, R7, R4, R8, R9;</text:span></text:p>
            </text:list-item>
            <text:list-item>
              <text:p text:style-name="P20"><text:span text:style-name="Strong_20_Emphasis"><text:span text:style-name="T6">1 кОм:</text:span></text:span><text:span text:style-name="T6"> R5.</text:span></text:p>
            </text:list-item>
          </text:list>
        </text:list-item>
        <text:list-item>
          <text:p text:style-name="P20"><text:span text:style-name="Strong_20_Emphasis"><text:span text:style-name="T6">SW1, SW2, SW3, SW5</text:span></text:span><text:span text:style-name="T6">: </text:span><text:span text:style-name="T7">переключатели</text:span><text:span text:style-name="T6">.</text:span></text:p>
          <text:list>
            <text:list-item>
              <text:p text:style-name="P20"><text:span text:style-name="Emphasis"><text:span text:style-name="T6">Корпуса:</text:span></text:span><text:span text:style-name="T6"> SW_SPST_B3S-1100 (для SW1-SW3) и Nidec_Copal_CAS-120A (для SW5).</text:span></text:p>
            </text:list-item>
          </text:list>
        </text:list-item>
        <text:list-item>
          <text:p text:style-name="P20"><text:span text:style-name="Strong_20_Emphasis"><text:span text:style-name="T6">SW4</text:span></text:span><text:span text:style-name="T6">: </text:span><text:span text:style-name="T7">тактовая</text:span><text:span text:style-name="T6"> кнопка SMD (SW_MEC_5E).</text:span></text:p>
          <text:list>
            <text:list-item>
              <text:p text:style-name="P20"><text:span text:style-name="Emphasis"><text:span text:style-name="T8">Корпус:</text:span></text:span><text:span text:style-name="T8"> Panasonic_EVQPUL_EVQPUC.</text:span></text:p>
            </text:list-item>
          </text:list>
        </text:list-item>
      </text:list>
      <text:p text:style-name="P16"><text:span text:style-name="T8"/></text:p>
      <text:h text:style-name="P21" text:outline-level="2"><text:soft-page-break/></text:h>
      <text:h text:style-name="P21" text:outline-level="2"><text:bookmark-start text:name="__RefHeading___Toc1727_2825539701"/>1.3. Описание схемы электрической принципиальной.<text:bookmark-end text:name="__RefHeading___Toc1727_2825539701"/></text:h>
      <text:p text:style-name="P22">Общее назначение</text:p>
      <text:p text:style-name="Text_20_body"><text:bookmark-start text:name="__RefHeading___Toc1269_2572271089"/>Электрическая принципиальная схема описывает цифровое устройство, предназначенное для приема, хранения и визуальной индикации 4-разрядных двоичных данных.<text:bookmark-end text:name="__RefHeading___Toc1269_2572271089"/></text:p>
      <text:p text:style-name="P23">Устройство построено на базе интегральной микросхемы 74LS175 <text:s/>и выполняет функции простейшего параллельного регистра памяти. Основное назначение схемы — демонстрация и изучение принципов работы триггерных схем, а также процессов записи, хранения и аппаратного сброса цифровой информации.</text:p>
      <text:p text:style-name="P23">Функционально схема включает в себя:</text:p>
      <text:p text:style-name="P23">Блок ввода данных: формирование логических уровней на входах триггеров с помощью кнопок (SW1–SW3).</text:p>
      <text:p text:style-name="P23">Блок управления: генерация тактовых импульсов для записи данных (SW4) и сигнал глобального сброса всех разрядов в ноль (SW5).</text:p>
      <text:p text:style-name="P23">Блок индикации: наглядное отображение текущего состояния выходов Q0–Q3 с помощью светодиодов (D4–D7).</text:p>
      <text:p text:style-name="P23">Устройство имеет автономное питание от батареи 4.5В и может применяться в качестве учебного стенда, лабораторного макета или демонстрационного образца при изучении основ цифровой схемотехники.</text:p>
      <text:p text:style-name="P24"><text:line-break/></text:p>
      <text:p text:style-name="P25">1.4. Расчет номиналов элементов схемы.</text:p>
      <text:p text:style-name="P26">2. Расчет токоограничивающих резисторов для светодиодов</text:p>
      <text:p text:style-name="P26">2.1. Для красных/желтых светодиодов (D1-D3, D5-D8)</text:p>
      <text:p text:style-name="P26">Принимаем Uпад = 2.0 В</text:p>
      <text:p text:style-name="P26">Расчет сопротивления:</text:p>
      <text:p text:style-name="P26">R = (Uпит - Uпад) / Iпр</text:p>
      <text:p text:style-name="P26">R = (4.5В - 2.0В) / 0.02А</text:p>
      <text:p text:style-name="P26">R = 2.5В / 0.02А</text:p>
      <text:p text:style-name="P26"><text:soft-page-break/>R = 125 Ом</text:p>
      <text:p text:style-name="P25"><text:span text:style-name="T9">Ближайший стандартный номинал: 120 Ом или 150 Ом</text:span></text:p>
      <text:p text:style-name="P26">Проверка тока для R = 220 Ом (фактический номинал в схеме):</text:p>
      <text:p text:style-name="P26">I = (4.5В - 2.0В) / 220 Ом</text:p>
      <text:p text:style-name="P26">I = 2.5В / 220 Ом</text:p>
      <text:p text:style-name="P26">I = 11.4 мА</text:p>
      <text:p text:style-name="P26">2.2. Для зеленых/синих светодиодов</text:p>
      <text:p text:style-name="P26">Принимаем Uпад = 3.0 В</text:p>
      <text:p text:style-name="P26">Расчет сопротивления:</text:p>
      <text:p text:style-name="P26">R = (4.5В - 3.0В) / 0.02А</text:p>
      <text:p text:style-name="P26">R = 1.5В / 0.02А</text:p>
      <text:p text:style-name="P26">R = 75 Ом</text:p>
      <text:p text:style-name="P26">Проверка для R = 220 Ом:</text:p>
      <text:p text:style-name="P26">I = (4.5В - 3.0В) / 220 Ом</text:p>
      <text:p text:style-name="P26">I = 1.5В / 220 Ом</text:p>
      <text:p text:style-name="P26">I = 6.8 мА</text:p>
      <text:p text:style-name="P26">3. Расчет резистора R5 (1 кОм)</text:p>
      <text:p text:style-name="P26">R5 = 1 кОм подключен к светодиоду D4</text:p>
      <text:p text:style-name="P26">Ток через D4:</text:p>
      <text:p text:style-name="P26">I = (4.5В - 2.0В) / 1000 Ом</text:p>
      <text:p text:style-name="P26">I = 2.5В / 1000 Ом</text:p>
      <text:p text:style-name="P26">I = 2.5 мА</text:p>
      <text:p text:style-name="P24"/>
      <text:p text:style-name="P27"/>
      <text:p text:style-name="P28"/>
      <text:p text:style-name="P28"/>
      <text:p text:style-name="P28"/>
      <text:h text:style-name="P29" text:outline-level="2"><text:bookmark-start text:name="__RefHeading___Toc1880_2825539701"/>1.5. Перечень элементов.<text:bookmark-end text:name="__RefHeading___Toc1880_2825539701"/></text:h>
      <text:p text:style-name="P30">Здесь необходимо по шаблону заполнить таблицу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31">Поз. обозначение</text:p>
          </table:table-cell>
          <table:table-cell table:style-name="Таблица1.A1" office:value-type="string">
            <text:p text:style-name="P31">Наименование</text:p>
          </table:table-cell>
          <table:table-cell table:style-name="Таблица1.A1" office:value-type="string">
            <text:p text:style-name="P31">Кол.</text:p>
          </table:table-cell>
          <table:table-cell table:style-name="Таблица1.D1" office:value-type="string">
            <text:p text:style-name="P31">Примечание</text:p>
          </table:table-cell>
        </table:table-row>
        <table:table-row>
          <table:table-cell table:style-name="Таблица1.A2" office:value-type="string">
            <text:p text:style-name="P32"/>
          </table:table-cell>
          <table:table-cell table:style-name="Таблица1.A2" office:value-type="string">
            <text:p text:style-name="P31">Микросхемы</text:p>
          </table:table-cell>
          <table:table-cell table:style-name="Таблица1.A2" office:value-type="string">
            <text:p text:style-name="P32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31">U1</text:p>
          </table:table-cell>
          <table:table-cell table:style-name="Таблица1.A2" office:value-type="string">
            <text:p text:style-name="P33">74LS175</text:p>
          </table:table-cell>
          <table:table-cell table:style-name="Таблица1.A2" office:value-type="string">
            <text:p text:style-name="P31">1</text:p>
          </table:table-cell>
          <table:table-cell table:style-name="Таблица1.D2" office:value-type="string">
            <text:p text:style-name="P33">DIP-16</text:p>
          </table:table-cell>
        </table:table-row>
        <table:table-row>
          <table:table-cell table:style-name="Таблица1.A2" office:value-type="string">
            <text:p text:style-name="P32"/>
          </table:table-cell>
          <table:table-cell table:style-name="Таблица1.A2" office:value-type="string">
            <text:p text:style-name="P31">Резисторы</text:p>
          </table:table-cell>
          <table:table-cell table:style-name="Таблица1.A2" office:value-type="string">
            <text:p text:style-name="P32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31">R1-<text:span text:style-name="T10">R</text:span><text:span text:style-name="T11">8</text:span></text:p>
          </table:table-cell>
          <table:table-cell table:style-name="Таблица1.A2" office:value-type="string">
            <text:p text:style-name="P34">0,25 <text:span text:style-name="T10">Вт</text:span> — <text:span text:style-name="T11">220</text:span> Ом <text:span text:style-name="T12">±</text:span><text:span text:style-name="T13">10%</text:span></text:p>
          </table:table-cell>
          <table:table-cell table:style-name="Таблица1.A2" office:value-type="string">
            <text:p text:style-name="P35">8</text:p>
          </table:table-cell>
          <table:table-cell table:style-name="Таблица1.D2" office:value-type="string">
            <text:p text:style-name="P36">SMD 12<text:span text:style-name="T11">06</text:span></text:p>
          </table:table-cell>
        </table:table-row>
        <table:table-row>
          <table:table-cell table:style-name="Таблица1.A2" office:value-type="string">
            <text:p text:style-name="P35">R9</text:p>
          </table:table-cell>
          <table:table-cell table:style-name="Таблица1.A2" office:value-type="string">
            <text:p text:style-name="P37">0,25 <text:span text:style-name="T10">Вт</text:span> — <text:span text:style-name="T11">220</text:span> Ом <text:span text:style-name="T12">±</text:span><text:span text:style-name="T13">10%</text:span></text:p>
          </table:table-cell>
          <table:table-cell table:style-name="Таблица1.A2" office:value-type="string">
            <text:p text:style-name="P35">1</text:p>
          </table:table-cell>
          <table:table-cell table:style-name="Таблица1.D2" office:value-type="string">
            <text:p text:style-name="P38">SMD 1206</text:p>
          </table:table-cell>
        </table:table-row>
        <table:table-row>
          <table:table-cell table:style-name="Таблица1.A2" office:value-type="string">
            <text:p text:style-name="P32"/>
          </table:table-cell>
          <table:table-cell table:style-name="Таблица1.A2" office:value-type="string">
            <text:p text:style-name="P35">Светодиоды</text:p>
          </table:table-cell>
          <table:table-cell table:style-name="Таблица1.A2" office:value-type="string">
            <text:p text:style-name="P32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35">LED 1- LED 8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P40">8</text:p>
          </table:table-cell>
          <table:table-cell table:style-name="Таблица1.D2" office:value-type="string">
            <text:p text:style-name="P38">SMD 0805</text:p>
          </table:table-cell>
        </table:table-row>
        <table:table-row>
          <table:table-cell table:style-name="Таблица1.A2" office:value-type="string">
            <text:p text:style-name="P32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P32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32"/>
          </table:table-cell>
          <table:table-cell table:style-name="Таблица1.A2" office:value-type="string">
            <text:p text:style-name="P41">Источник питания</text:p>
          </table:table-cell>
          <table:table-cell table:style-name="Таблица1.A2" office:value-type="string">
            <text:p text:style-name="P32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1">BT1</text:p>
          </table:table-cell>
          <table:table-cell table:style-name="Таблица1.A2" office:value-type="string">
            <text:p text:style-name="P42">Батарейка 4,5 В</text:p>
          </table:table-cell>
          <table:table-cell table:style-name="Таблица1.A2" office:value-type="string">
            <text:p text:style-name="P41">1</text:p>
          </table:table-cell>
          <table:table-cell table:style-name="Таблица1.D2" office:value-type="string">
            <text:p text:style-name="P33">CR2032</text:p>
          </table:table-cell>
        </table:table-row>
        <table:table-row>
          <table:table-cell table:style-name="Таблица1.A2" office:value-type="string">
            <text:p text:style-name="P41"/>
          </table:table-cell>
          <table:table-cell table:style-name="Таблица1.A2" office:value-type="string">
            <text:p text:style-name="P43">Коммутационные изделия</text:p>
          </table:table-cell>
          <table:table-cell table:style-name="Таблица1.A2" office:value-type="string">
            <text:p text:style-name="P41"/>
          </table:table-cell>
          <table:table-cell table:style-name="Таблица1.D2" office:value-type="string">
            <text:p text:style-name="P33"/>
          </table:table-cell>
        </table:table-row>
        <table:table-row>
          <table:table-cell table:style-name="Таблица1.A2" office:value-type="string">
            <text:p text:style-name="P40">SW1-SW3</text:p>
          </table:table-cell>
          <table:table-cell table:style-name="Таблица1.A2" office:value-type="string">
            <text:p text:style-name="P42">Переключатель Nides Cas</text:p>
          </table:table-cell>
          <table:table-cell table:style-name="Таблица1.A2" office:value-type="string">
            <text:p text:style-name="P40">3</text:p>
          </table:table-cell>
          <table:table-cell table:style-name="Таблица1.D2" office:value-type="string">
            <text:p text:style-name="P33"/>
          </table:table-cell>
        </table:table-row>
        <table:table-row>
          <table:table-cell table:style-name="Таблица1.A2" office:value-type="string">
            <text:p text:style-name="P40">SW5</text:p>
          </table:table-cell>
          <table:table-cell table:style-name="Таблица1.A2" office:value-type="string">
            <text:p text:style-name="P42">Переключатель Nides Cas</text:p>
          </table:table-cell>
          <table:table-cell table:style-name="Таблица1.A2" office:value-type="string">
            <text:p text:style-name="P40">1</text:p>
          </table:table-cell>
          <table:table-cell table:style-name="Таблица1.D2" office:value-type="string">
            <text:p text:style-name="P33"/>
          </table:table-cell>
        </table:table-row>
        <table:table-row>
          <table:table-cell table:style-name="Таблица1.A2" office:value-type="string">
            <text:p text:style-name="P40">SW4</text:p>
          </table:table-cell>
          <table:table-cell table:style-name="Таблица1.A2" office:value-type="string">
            <text:p text:style-name="P42">Тактовая кнопка KLS-1235LP20</text:p>
          </table:table-cell>
          <table:table-cell table:style-name="Таблица1.A2" office:value-type="string">
            <text:p text:style-name="P40">1</text:p>
          </table:table-cell>
          <table:table-cell table:style-name="Таблица1.D2" office:value-type="string">
            <text:p text:style-name="P33"/>
          </table:table-cell>
        </table:table-row>
      </table:table>
      <text:p text:style-name="P44"/>
      <text:p text:style-name="P44"/>
      <text:p text:style-name="P44"/>
      <text:h text:style-name="P45" text:outline-level="1"><text:bookmark-start text:name="__RefHeading___Toc1257_2825539701"/>2. Конструкторский раздел<text:bookmark-end text:name="__RefHeading___Toc1257_2825539701"/></text:h>
      <text:h text:style-name="P46" text:outline-level="2"><text:bookmark-start text:name="__RefHeading___Toc1979_2825539701"/>2.1. Разработка принципиальной схемы в САПР KiCAD.<text:bookmark-end text:name="__RefHeading___Toc1979_2825539701"/></text:h>
      <text:p text:style-name="P47">Здесь необходимо привести скриншот принципиальной схемы из KiCAD.</text:p>
      <text:p text:style-name="P47"/>
      <text:p text:style-name="P47"/>
      <text:p text:style-name="P47"><draw:frame draw:style-name="fr1" draw:name="Изображение1" text:anchor-type="char" svg:x="-1.088cm" svg:y="0cm" svg:width="18.604cm" svg:height="13.07cm" draw:z-index="2"><draw:image xlink:href="Pictures/100000000000068E0000049B4F2270E3.png" xlink:type="simple" xlink:show="embed" xlink:actuate="onLoad" draw:mime-type="image/png"/></draw:frame></text:p>
      <text:h text:style-name="P48" text:outline-level="2"><text:bookmark-start text:name="__RefHeading___Toc1981_2825539701"/>2.2. Чертежи печатной платы <text:span text:style-name="T14">в САПР KiCAD</text:span>.<text:bookmark-end text:name="__RefHeading___Toc1981_2825539701"/></text:h>
      <text:p text:style-name="P49">Здесь необходимо отдельно привести скриншоты из KiCAD:</text:p>
      <text:p text:style-name="P49">- верхнего медного слоя;</text:p>
      <text:p text:style-name="P49"><draw:frame draw:style-name="fr2" draw:name="Изображение2" text:anchor-type="char" svg:width="13.025cm" svg:height="12.386cm" draw:z-index="3"><draw:image xlink:href="Pictures/10000000000003E8000003B6429E944D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- нижнего медного слоя;</text:p>
      <text:p text:style-name="P49"><draw:frame draw:style-name="fr2" draw:name="Изображение3" text:anchor-type="char" svg:width="11.047cm" svg:height="10.34cm" draw:z-index="4"><draw:image xlink:href="Pictures/10000000000003660000039BD3FFE950.png" xlink:type="simple" xlink:show="embed" xlink:actuate="onLoad" draw:mime-type="image/png"/></draw:frame></text:p>
      <text:p text:style-name="P49"/>
      <text:p text:style-name="P49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- верхний слой паяльной маски;</text:p>
      <text:p text:style-name="P50"><draw:frame draw:style-name="fr2" draw:name="Изображение4" text:anchor-type="char" svg:width="11.324cm" svg:height="11.155cm" draw:z-index="5"><draw:image xlink:href="Pictures/10000000000003E7000003D800A482A2.png" xlink:type="simple" xlink:show="embed" xlink:actuate="onLoad" draw:mime-type="image/png"/></draw:frame></text:p>
      <text:p text:style-name="P50"/>
      <text:p text:style-name="P50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- <text:span text:style-name="T15">нижний</text:span> слой паяльной маски;</text:p>
      <text:p text:style-name="P49"><draw:frame draw:style-name="fr2" draw:name="Изображение5" text:anchor-type="char" svg:width="9.158cm" svg:height="9.269cm" draw:z-index="6"><draw:image xlink:href="Pictures/10000000000003D2000003DEF9DA302C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- <text:span text:style-name="T15">верхний слой шелкографии;</text:span></text:p>
      <text:p text:style-name="P49"><draw:frame draw:style-name="fr2" draw:name="Изображение6" text:anchor-type="char" svg:width="9.294cm" svg:height="9.013cm" draw:z-index="7"><draw:image xlink:href="Pictures/10000000000003E2000003C4D6A22EBA.png" xlink:type="simple" xlink:show="embed" xlink:actuate="onLoad" draw:mime-type="image/png"/></draw:frame></text:p>
      <text:p text:style-name="P49"/>
      <text:p text:style-name="P49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- нижний слой шелкографии.</text:p>
      <text:p text:style-name="P51"><draw:frame draw:style-name="fr2" draw:name="Изображение7" text:anchor-type="char" svg:width="10.269cm" svg:height="10.134cm" draw:z-index="8"><draw:image xlink:href="Pictures/10000000000003D9000003CC48B01F5D.png" xlink:type="simple" xlink:show="embed" xlink:actuate="onLoad" draw:mime-type="image/png"/></draw:frame></text:p>
      <text:p text:style-name="P51"/>
      <text:p text:style-name="P51"/>
      <text:p text:style-name="P51"/>
      <text:h text:style-name="P52" text:outline-level="2"><text:bookmark-start text:name="__RefHeading___Toc1983_2825539701"/>2.3. Чертеж общего вида <text:span text:style-name="T16">в САПР KiCAD</text:span>.<text:bookmark-end text:name="__RefHeading___Toc1983_2825539701"/></text:h>
      <text:p text:style-name="P53">Здесь необходимо привести скриншоты из KiCAD 3D модели:</text:p>
      <text:p text:style-name="P53">- вид сверху;</text:p>
      <text:p text:style-name="P53"><draw:frame draw:style-name="fr2" draw:name="Изображение8" text:anchor-type="char" svg:width="11.225cm" svg:height="11.109cm" draw:z-index="9"><draw:image xlink:href="Pictures/10000000000004F4000004E74CA4DA3B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- вид спереди;</text:p>
      <text:p text:style-name="P53"><draw:frame draw:style-name="fr3" draw:name="Изображение9" text:anchor-type="char" svg:width="17.002cm" svg:height="3.286cm" draw:z-index="0"><draw:image xlink:href="Pictures/10000000000005920000009C5C98DDF0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><text:soft-page-break/>- вид сбоку;</text:p>
      <text:p text:style-name="P53"><draw:frame draw:style-name="fr2" draw:name="Изображение10" text:anchor-type="char" svg:width="4.576cm" svg:height="16.164cm" draw:z-index="1"><draw:image xlink:href="Pictures/10000000000000A500000465F751BE02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- изометрическая проекция.</text:p>
      <text:p text:style-name="P53"><draw:frame draw:style-name="fr4" draw:name="Изображение11" text:anchor-type="char" svg:width="12.511cm" svg:height="11.352cm" draw:z-index="10"><draw:image xlink:href="Pictures/100000000000035500000306638B385D.png" xlink:type="simple" xlink:show="embed" xlink:actuate="onLoad" draw:mime-type="image/png"/></draw:frame></text:p>
      <text:p text:style-name="P54"/>
      <text:p text:style-name="P54"/>
      <text:p text:style-name="P54"/>
      <text:p text:style-name="P55"/>
      <text:p text:style-name="P55"/>
      <text:p text:style-name="P55"/>
      <text:p text:style-name="P55"/>
      <text:p text:style-name="P55"/>
      <text:p text:style-name="P5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Обычный" style:font-family-generic="swiss"/>
    <style:font-face style:name="Open Sans2" svg:font-family="'Open Sans', Arial, 'Helvetica CY', Helvetica, Roboto, 'Nimbus Sans L', sans-serif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adornments="Жирный" style:font-family-generic="roman"/>
    <style:font-face style:name="Times new roman2" svg:font-family="'Times new roman'" style:font-adornments="Обычный" style:font-family-generic="roman"/>
    <style:font-face style:name="system-ui" svg:font-family="system-ui, ui-sans-serif, apple-system, BlinkMacSystemFont, Inter, NotoSansHa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2" fo:font-family="'Times new roman'" style:font-style-name="Обычный" style:font-family-generic="roman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 fo:text-indent="1.499cm" style:auto-text-indent="false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top="0cm" fo:margin-bottom="0cm" style:contextual-spacing="false" fo:line-height="150%" fo:text-align="center" style:justify-single-word="false" fo:text-indent="0cm" style:auto-text-indent="false" style:page-number="auto" text:number-lines="false" text:line-number="0"/>
      <style:text-properties style:font-name="Times new roman1" fo:font-family="'Times new roman'" style:font-style-name="Жирный" style:font-family-generic="roman" fo:font-size="16pt" fo:font-weight="bold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 fo:line-height="150%" fo:text-indent="1.499cm" style:auto-text-indent="false"/>
      <style:text-properties style:font-name="Times new roman1" fo:font-family="'Times new roman'" style:font-style-name="Жирный" style:font-family-generic="roman" fo:font-size="18pt" fo:font-weight="bold" style:font-size-asian="18pt" style:font-weight-asian="bold" style:font-size-complex="18pt" style:font-weight-complex="600"/>
    </style:style>
    <style:style style:name="Contents_20_1" style:display-name="Contents 1" style:family="paragraph" style:parent-style-name="Index" style:class="index">
      <style:paragraph-properties fo:margin-left="0cm" fo:line-height="150%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 fo:line-height="150%" fo:text-indent="1.499cm" style:auto-text-indent="false"/>
      <style:text-properties style:font-name="Times new roman2" fo:font-family="'Times new roman'" style:font-style-name="Обычный" style:font-family-generic="roman" fo:font-size="16pt" fo:font-weight="normal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499cm" fo:line-height="150%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line-height="150%"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Droid Sans1" style:font-family-complex="'Droid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Droid Sans1" style:font-family-complex="'Droid Sans'" style:font-family-generic-complex="system" style:font-pitch-complex="variable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2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1"/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1T14:09:06.063133719</meta:creation-date>
    <meta:generator>LibreOffice/24.8.4.1$Linux_X86_64 LibreOffice_project/480$Build-1</meta:generator>
    <dc:date>2026-06-08T20:10:36.579640454</dc:date>
    <meta:editing-duration>PT1H47M18S</meta:editing-duration>
    <meta:editing-cycles>29</meta:editing-cycles>
    <meta:document-statistic meta:table-count="1" meta:image-count="11" meta:object-count="0" meta:page-count="14" meta:paragraph-count="135" meta:word-count="700" meta:character-count="4559" meta:non-whitespace-character-count="3988"/>
  </office:meta>
</office:document-meta>
</file>